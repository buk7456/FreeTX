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090EEAB5E75.png" manifest:media-type="image/png"/>
  <manifest:file-entry manifest:full-path="Pictures/1000000100000320000002D0B1F67A83.png" manifest:media-type="image/png"/>
  <manifest:file-entry manifest:full-path="Pictures/1000000100000100000000903184CEF7.png" manifest:media-type="image/png"/>
  <manifest:file-entry manifest:full-path="Pictures/10000001000003200000025864949D58.png" manifest:media-type="image/png"/>
  <manifest:file-entry manifest:full-path="Pictures/100000010000010000000080E175B7F1.png" manifest:media-type="image/png"/>
  <manifest:file-entry manifest:full-path="Pictures/100000000000021000000120F3DE5D98.png" manifest:media-type="image/png"/>
  <manifest:file-entry manifest:full-path="Pictures/100000010000034000000130FD6B03EE.png" manifest:media-type="image/png"/>
  <manifest:file-entry manifest:full-path="Pictures/10000000000000F8000002059F421693.png" manifest:media-type="image/png"/>
  <manifest:file-entry manifest:full-path="Pictures/10000001000001000000009092F2CA2E.png" manifest:media-type="image/png"/>
  <manifest:file-entry manifest:full-path="Pictures/100000010000020800000080B733F0F5.png" manifest:media-type="image/png"/>
  <manifest:file-entry manifest:full-path="Pictures/1000000100000208000000807357B4DD.png" manifest:media-type="image/png"/>
  <manifest:file-entry manifest:full-path="Pictures/10000001000003100000008089C886C6.png" manifest:media-type="image/png"/>
  <manifest:file-entry manifest:full-path="Pictures/1000000000000100000000D0E6950B89.png" manifest:media-type="image/png"/>
  <manifest:file-entry manifest:full-path="Pictures/100000000000010000000080CE4096A4.png" manifest:media-type="image/png"/>
  <manifest:file-entry manifest:full-path="Pictures/100000010000010000000090E269E195.png" manifest:media-type="image/png"/>
  <manifest:file-entry manifest:full-path="Pictures/1000000000000100000000805F3CA18F.png" manifest:media-type="image/png"/>
  <manifest:file-entry manifest:full-path="Pictures/1000000100000100000000B0A3A26201.png" manifest:media-type="image/png"/>
  <manifest:file-entry manifest:full-path="Pictures/10000001000001000000008054C75F4D.png" manifest:media-type="image/png"/>
  <manifest:file-entry manifest:full-path="Pictures/1000000100000100000000801A7D5F20.png" manifest:media-type="image/png"/>
  <manifest:file-entry manifest:full-path="Pictures/1000000100000100000000A08B611755.png" manifest:media-type="image/png"/>
  <manifest:file-entry manifest:full-path="Pictures/1000000100000100000000C01CFFD8F8.png" manifest:media-type="image/png"/>
  <manifest:file-entry manifest:full-path="Pictures/1000000100000100000000A0C3E6FB8E.png" manifest:media-type="image/png"/>
  <manifest:file-entry manifest:full-path="Pictures/1000000000000100000000803B61DE4C.png" manifest:media-type="image/png"/>
  <manifest:file-entry manifest:full-path="Pictures/100000000000010000000080CB39AF7C.png" manifest:media-type="image/png"/>
  <manifest:file-entry manifest:full-path="Pictures/1000000100000100000000C00374513B.png" manifest:media-type="image/png"/>
  <manifest:file-entry manifest:full-path="Pictures/10000001000001000000008006FCE155.png" manifest:media-type="image/png"/>
  <manifest:file-entry manifest:full-path="Pictures/100000010000010000000080CEDC7F9C.png" manifest:media-type="image/png"/>
  <manifest:file-entry manifest:full-path="Pictures/100000010000010000000080259B99C1.png" manifest:media-type="image/png"/>
  <manifest:file-entry manifest:full-path="Pictures/100000010000010000000080E4213904.png" manifest:media-type="image/png"/>
  <manifest:file-entry manifest:full-path="Pictures/1000000100000100000000C0B8158663.png" manifest:media-type="image/png"/>
  <manifest:file-entry manifest:full-path="Pictures/10000000000001000000009058F652FB.png" manifest:media-type="image/png"/>
  <manifest:file-entry manifest:full-path="Pictures/100000010000021000000110A71D3E18.png" manifest:media-type="image/png"/>
  <manifest:file-entry manifest:full-path="Pictures/1000000100000100000000B059BFFE49.png" manifest:media-type="image/png"/>
  <manifest:file-entry manifest:full-path="Pictures/100000000000010000000080F21E3AC3.png" manifest:media-type="image/png"/>
  <manifest:file-entry manifest:full-path="Pictures/100000000000010000000080DFDF6914.png" manifest:media-type="image/png"/>
  <manifest:file-entry manifest:full-path="Pictures/10000000000001000000008031C77CD9.png" manifest:media-type="image/png"/>
  <manifest:file-entry manifest:full-path="Pictures/100000000000010000000080700E106B.png" manifest:media-type="image/png"/>
  <manifest:file-entry manifest:full-path="Pictures/10000000000001000000008050663AC4.png" manifest:media-type="image/png"/>
  <manifest:file-entry manifest:full-path="Pictures/10000000000001000000008054F320BD.png" manifest:media-type="image/png"/>
  <manifest:file-entry manifest:full-path="Pictures/100000000000010000000080CF265E69.png" manifest:media-type="image/png"/>
  <manifest:file-entry manifest:full-path="Pictures/1000000100000100000000D8F4858D4B.png" manifest:media-type="image/png"/>
  <manifest:file-entry manifest:full-path="Pictures/1000000100000100000000809A160DF8.png" manifest:media-type="image/png"/>
  <manifest:file-entry manifest:full-path="Pictures/10000001000001000000008070BA95A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992cm" fo:margin-left="0.009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1.002cm"/>
    </style:style>
    <style:style style:name="Table1.C" style:family="table-column">
      <style:table-column-properties style:column-width="0.99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cm" fo:margin-bottom="0.494cm" style:contextual-spacing="false"/>
    </style:style>
    <style:style style:name="P2" style:family="paragraph" style:parent-style-name="Standard" style:list-style-name="WWNum1">
      <style:paragraph-properties fo:margin-top="0.494cm" fo:margin-bottom="0cm" style:contextual-spacing="false" fo:line-height="100%"/>
    </style:style>
    <style:style style:name="P3" style:family="paragraph" style:parent-style-name="Standard" style:list-style-name="WWNum1">
      <style:paragraph-properties fo:margin-top="0cm" fo:margin-bottom="0cm" style:contextual-spacing="false" fo:line-height="100%"/>
    </style:style>
    <style:style style:name="P4" style:family="paragraph" style:parent-style-name="Standard" style:list-style-name="WWNum1">
      <style:paragraph-properties fo:margin-top="0cm" fo:margin-bottom="0.494cm" style:contextual-spacing="false" fo:line-height="100%"/>
    </style:style>
    <style:style style:name="P5" style:family="paragraph" style:parent-style-name="Heading_20_1">
      <style:paragraph-properties fo:margin-top="0cm" fo:margin-bottom="0.494cm" style:contextual-spacing="false" fo:break-before="page"/>
    </style:style>
    <style:style style:name="P6" style:family="paragraph" style:parent-style-name="Normal_20__28_Web_29_">
      <style:paragraph-properties fo:margin-top="0.494cm" fo:margin-bottom="0.494cm" style:contextual-spacing="false"/>
      <style:text-properties style:font-name="Liberation Serif"/>
    </style:style>
    <style:style style:name="P7" style:family="paragraph" style:parent-style-name="Normal_20__28_Web_29_">
      <style:paragraph-properties fo:margin-top="0.494cm" fo:margin-bottom="0.494cm" style:contextual-spacing="false"/>
    </style:style>
    <style:style style:name="P8" style:family="paragraph" style:parent-style-name="Standard" style:list-style-name="WWNum2">
      <style:paragraph-properties fo:margin-top="0.494cm" fo:margin-bottom="0cm" style:contextual-spacing="false" fo:line-height="100%"/>
    </style:style>
    <style:style style:name="P9" style:family="paragraph" style:parent-style-name="Standard" style:list-style-name="WWNum2">
      <style:paragraph-properties fo:margin-top="0cm" fo:margin-bottom="0cm" style:contextual-spacing="false" fo:line-height="100%"/>
    </style:style>
    <style:style style:name="P10" style:family="paragraph" style:parent-style-name="Standard" style:list-style-name="WWNum2">
      <style:paragraph-properties fo:margin-top="0cm" fo:margin-bottom="0.494cm" style:contextual-spacing="false" fo:line-height="100%"/>
    </style:style>
    <style:style style:name="P11" style:family="paragraph" style:parent-style-name="Standard" style:list-style-name="WWNum3">
      <style:paragraph-properties fo:margin-top="0.494cm" fo:margin-bottom="0cm" style:contextual-spacing="false" fo:line-height="100%"/>
    </style:style>
    <style:style style:name="P12" style:family="paragraph" style:parent-style-name="Standard" style:list-style-name="WWNum3">
      <style:paragraph-properties fo:margin-top="0cm" fo:margin-bottom="0cm" style:contextual-spacing="false" fo:line-height="100%"/>
    </style:style>
    <style:style style:name="P13" style:family="paragraph" style:parent-style-name="Standard" style:list-style-name="WWNum3">
      <style:paragraph-properties fo:margin-top="0cm" fo:margin-bottom="0.494cm" style:contextual-spacing="false" fo:line-height="100%"/>
    </style:style>
    <style:style style:name="P14" style:family="paragraph" style:parent-style-name="Standard">
      <style:paragraph-properties fo:margin-top="0.494cm" fo:margin-bottom="0.494cm" style:contextual-spacing="false" fo:line-height="100%"/>
    </style:style>
    <style:style style:name="P15" style:family="paragraph" style:parent-style-name="Standard" style:list-style-name="WWNum4">
      <style:paragraph-properties fo:margin-top="0.494cm" fo:margin-bottom="0cm" style:contextual-spacing="false" fo:line-height="100%"/>
    </style:style>
    <style:style style:name="P16" style:family="paragraph" style:parent-style-name="Standard" style:list-style-name="WWNum4">
      <style:paragraph-properties fo:margin-top="0cm" fo:margin-bottom="0cm" style:contextual-spacing="false" fo:line-height="100%"/>
    </style:style>
    <style:style style:name="P17" style:family="paragraph" style:parent-style-name="Standard" style:list-style-name="WWNum4">
      <style:paragraph-properties fo:margin-top="0cm" fo:margin-bottom="0.494cm" style:contextual-spacing="false" fo:line-height="100%"/>
    </style:style>
    <style:style style:name="P18" style:family="paragraph" style:parent-style-name="Standard" style:list-style-name="WWNum5">
      <style:paragraph-properties fo:margin-top="0.494cm" fo:margin-bottom="0cm" style:contextual-spacing="false" fo:line-height="100%"/>
    </style:style>
    <style:style style:name="P19" style:family="paragraph" style:parent-style-name="Standard" style:list-style-name="WWNum5">
      <style:paragraph-properties fo:margin-top="0cm" fo:margin-bottom="0cm" style:contextual-spacing="false" fo:line-height="100%"/>
    </style:style>
    <style:style style:name="P20" style:family="paragraph" style:parent-style-name="Standard" style:list-style-name="WWNum5">
      <style:paragraph-properties fo:margin-top="0cm" fo:margin-bottom="0.494cm" style:contextual-spacing="false" fo:line-height="100%"/>
    </style:style>
    <style:style style:name="P21" style:family="paragraph" style:parent-style-name="Standard" style:list-style-name="WWNum6">
      <style:paragraph-properties fo:margin-top="0.494cm" fo:margin-bottom="0cm" style:contextual-spacing="false" fo:line-height="100%"/>
    </style:style>
    <style:style style:name="P22" style:family="paragraph" style:parent-style-name="Standard" style:list-style-name="WWNum6">
      <style:paragraph-properties fo:margin-top="0cm" fo:margin-bottom="0cm" style:contextual-spacing="false" fo:line-height="100%"/>
    </style:style>
    <style:style style:name="P23" style:family="paragraph" style:parent-style-name="Standard" style:list-style-name="WWNum6">
      <style:paragraph-properties fo:margin-top="0cm" fo:margin-bottom="0.494cm" style:contextual-spacing="false" fo:line-height="100%"/>
    </style:style>
    <style:style style:name="P24" style:family="paragraph" style:parent-style-name="Standard" style:list-style-name="WWNum7">
      <style:paragraph-properties fo:margin-top="0.494cm" fo:margin-bottom="0cm" style:contextual-spacing="false" fo:line-height="100%"/>
    </style:style>
    <style:style style:name="P25" style:family="paragraph" style:parent-style-name="Standard" style:list-style-name="WWNum7">
      <style:paragraph-properties fo:margin-top="0cm" fo:margin-bottom="0cm" style:contextual-spacing="false" fo:line-height="100%"/>
    </style:style>
    <style:style style:name="P26" style:family="paragraph" style:parent-style-name="Standard" style:list-style-name="WWNum7">
      <style:paragraph-properties fo:margin-top="0cm" fo:margin-bottom="0.494cm" style:contextual-spacing="false" fo:line-height="100%"/>
    </style:style>
    <style:style style:name="P27" style:family="paragraph" style:parent-style-name="Standard" style:list-style-name="WWNum8">
      <style:paragraph-properties fo:margin-top="0.494cm" fo:margin-bottom="0cm" style:contextual-spacing="false" fo:line-height="100%"/>
    </style:style>
    <style:style style:name="P28" style:family="paragraph" style:parent-style-name="Standard" style:list-style-name="WWNum8">
      <style:paragraph-properties fo:margin-top="0cm" fo:margin-bottom="0cm" style:contextual-spacing="false" fo:line-height="100%"/>
    </style:style>
    <style:style style:name="P29" style:family="paragraph" style:parent-style-name="Standard" style:list-style-name="WWNum8">
      <style:paragraph-properties fo:margin-top="0cm" fo:margin-bottom="0.494cm" style:contextual-spacing="false" fo:line-height="100%"/>
    </style:style>
    <style:style style:name="P30" style:family="paragraph" style:parent-style-name="Standard" style:list-style-name="WWNum9">
      <style:paragraph-properties fo:margin-top="0.494cm" fo:margin-bottom="0cm" style:contextual-spacing="false" fo:line-height="100%"/>
    </style:style>
    <style:style style:name="P31" style:family="paragraph" style:parent-style-name="Standard" style:list-style-name="WWNum9">
      <style:paragraph-properties fo:margin-top="0cm" fo:margin-bottom="0cm" style:contextual-spacing="false" fo:line-height="100%"/>
    </style:style>
    <style:style style:name="P32" style:family="paragraph" style:parent-style-name="Standard" style:list-style-name="WWNum9">
      <style:paragraph-properties fo:margin-top="0cm" fo:margin-bottom="0.494cm" style:contextual-spacing="false" fo:line-height="100%"/>
    </style:style>
    <style:style style:name="P33" style:family="paragraph" style:parent-style-name="Normal_20__28_Web_29_">
      <style:paragraph-properties fo:margin-top="0.494cm" fo:margin-bottom="0.494cm" style:contextual-spacing="false"/>
      <style:text-properties officeooo:paragraph-rsid="00154098"/>
    </style:style>
    <style:style style:name="P34" style:family="paragraph" style:parent-style-name="Normal_20__28_Web_29_">
      <style:paragraph-properties fo:margin-top="0.494cm" fo:margin-bottom="0.494cm" style:contextual-spacing="false"/>
      <style:text-properties officeooo:paragraph-rsid="002a0824"/>
    </style:style>
    <style:style style:name="P35" style:family="paragraph" style:parent-style-name="Normal_20__28_Web_29_">
      <style:paragraph-properties fo:margin-top="0.494cm" fo:margin-bottom="0.494cm" style:contextual-spacing="false"/>
      <style:text-properties officeooo:paragraph-rsid="00300df0"/>
    </style:style>
    <style:style style:name="P36" style:family="paragraph" style:parent-style-name="Standard" style:list-style-name="WWNum10">
      <style:paragraph-properties fo:margin-top="0.494cm" fo:margin-bottom="0cm" style:contextual-spacing="false" fo:line-height="100%"/>
    </style:style>
    <style:style style:name="P37" style:family="paragraph" style:parent-style-name="Standard" style:list-style-name="WWNum10">
      <style:paragraph-properties fo:margin-top="0cm" fo:margin-bottom="0cm" style:contextual-spacing="false" fo:line-height="100%"/>
    </style:style>
    <style:style style:name="P38" style:family="paragraph" style:parent-style-name="Standard" style:list-style-name="WWNum10">
      <style:paragraph-properties fo:margin-top="0cm" fo:margin-bottom="0.494cm" style:contextual-spacing="false" fo:line-height="100%"/>
    </style:style>
    <style:style style:name="P39" style:family="paragraph" style:parent-style-name="Standard" style:list-style-name="WWNum11">
      <style:paragraph-properties fo:margin-top="0.494cm" fo:margin-bottom="0cm" style:contextual-spacing="false" fo:line-height="100%"/>
    </style:style>
    <style:style style:name="P40" style:family="paragraph" style:parent-style-name="Standard" style:list-style-name="WWNum11">
      <style:paragraph-properties fo:margin-top="0cm" fo:margin-bottom="0cm" style:contextual-spacing="false" fo:line-height="100%"/>
    </style:style>
    <style:style style:name="P41" style:family="paragraph" style:parent-style-name="Standard" style:list-style-name="WWNum11">
      <style:paragraph-properties fo:margin-top="0cm" fo:margin-bottom="0.494cm" style:contextual-spacing="false" fo:line-height="100%"/>
    </style:style>
    <style:style style:name="P42" style:family="paragraph" style:parent-style-name="Standard" style:list-style-name="WWNum12">
      <style:paragraph-properties fo:margin-top="0.494cm" fo:margin-bottom="0cm" style:contextual-spacing="false" fo:line-height="100%"/>
    </style:style>
    <style:style style:name="P43" style:family="paragraph" style:parent-style-name="Standard" style:list-style-name="WWNum12">
      <style:paragraph-properties fo:margin-top="0cm" fo:margin-bottom="0cm" style:contextual-spacing="false" fo:line-height="100%"/>
    </style:style>
    <style:style style:name="P44" style:family="paragraph" style:parent-style-name="Standard" style:list-style-name="WWNum12">
      <style:paragraph-properties fo:margin-top="0cm" fo:margin-bottom="0.494cm" style:contextual-spacing="false" fo:line-height="100%"/>
    </style:style>
    <style:style style:name="P45" style:family="paragraph" style:parent-style-name="Normal_20__28_Web_29_">
      <style:paragraph-properties fo:margin-top="0cm" fo:margin-bottom="0cm" style:contextual-spacing="false" fo:text-align="start" style:justify-single-word="false" fo:orphans="2" fo:widows="2"/>
      <style:text-properties fo:language="en" fo:country="GB" style:letter-kerning="false" style:language-complex="ar" style:country-complex="SA"/>
    </style:style>
    <style:style style:name="P46" style:family="paragraph" style:parent-style-name="code_20_Style1">
      <style:text-properties style:font-name="Times New Roman" fo:font-size="12pt" officeooo:paragraph-rsid="00300df0" style:font-size-asian="12pt" style:font-name-complex="Times New Roman1" style:font-size-complex="12pt"/>
    </style:style>
    <style:style style:name="P47" style:family="paragraph" style:parent-style-name="Standard" style:list-style-name="WWNum13">
      <style:paragraph-properties fo:margin-top="0.494cm" fo:margin-bottom="0cm" style:contextual-spacing="false" fo:line-height="100%"/>
    </style:style>
    <style:style style:name="P48" style:family="paragraph" style:parent-style-name="Standard" style:list-style-name="WWNum13">
      <style:paragraph-properties fo:margin-top="0cm" fo:margin-bottom="0cm" style:contextual-spacing="false" fo:line-height="100%"/>
    </style:style>
    <style:style style:name="P49" style:family="paragraph" style:parent-style-name="Standard" style:list-style-name="WWNum13">
      <style:paragraph-properties fo:margin-top="0cm" fo:margin-bottom="0.494cm" style:contextual-spacing="false" fo:line-height="100%"/>
    </style:style>
    <style:style style:name="P50" style:family="paragraph" style:parent-style-name="Standard" style:list-style-name="WWNum14">
      <style:paragraph-properties fo:margin-top="0.494cm" fo:margin-bottom="0cm" style:contextual-spacing="false" fo:line-height="100%"/>
    </style:style>
    <style:style style:name="P51" style:family="paragraph" style:parent-style-name="Standard" style:list-style-name="WWNum14">
      <style:paragraph-properties fo:margin-top="0cm" fo:margin-bottom="0cm" style:contextual-spacing="false" fo:line-height="100%"/>
    </style:style>
    <style:style style:name="P52" style:family="paragraph" style:parent-style-name="Standard" style:list-style-name="WWNum14">
      <style:paragraph-properties fo:margin-top="0cm" fo:margin-bottom="0.494cm" style:contextual-spacing="false" fo:line-height="100%"/>
    </style:style>
    <style:style style:name="P53" style:family="paragraph" style:parent-style-name="Standard" style:list-style-name="WWNum15">
      <style:paragraph-properties fo:margin-top="0.494cm" fo:margin-bottom="0cm" style:contextual-spacing="false" fo:line-height="100%"/>
    </style:style>
    <style:style style:name="P54" style:family="paragraph" style:parent-style-name="Standard" style:list-style-name="WWNum15">
      <style:paragraph-properties fo:margin-top="0cm" fo:margin-bottom="0cm" style:contextual-spacing="false" fo:line-height="100%"/>
    </style:style>
    <style:style style:name="P55" style:family="paragraph" style:parent-style-name="Standard" style:list-style-name="WWNum15">
      <style:paragraph-properties fo:margin-top="0cm" fo:margin-bottom="0.494cm" style:contextual-spacing="false" fo:line-height="100%"/>
    </style:style>
    <style:style style:name="P56" style:family="paragraph" style:parent-style-name="Standard" style:list-style-name="WWNum16">
      <style:paragraph-properties fo:margin-top="0.494cm" fo:margin-bottom="0cm" style:contextual-spacing="false" fo:line-height="100%"/>
    </style:style>
    <style:style style:name="P57" style:family="paragraph" style:parent-style-name="Standard" style:list-style-name="WWNum16">
      <style:paragraph-properties fo:margin-top="0cm" fo:margin-bottom="0cm" style:contextual-spacing="false" fo:line-height="100%"/>
    </style:style>
    <style:style style:name="P58" style:family="paragraph" style:parent-style-name="Standard" style:list-style-name="WWNum16">
      <style:paragraph-properties fo:margin-top="0cm" fo:margin-bottom="0.494cm" style:contextual-spacing="false" fo:line-height="100%"/>
    </style:style>
    <style:style style:name="P59" style:family="paragraph" style:parent-style-name="Standard" style:list-style-name="WWNum17">
      <style:paragraph-properties fo:margin-top="0.494cm" fo:margin-bottom="0cm" style:contextual-spacing="false" fo:line-height="100%"/>
    </style:style>
    <style:style style:name="P60" style:family="paragraph" style:parent-style-name="Standard" style:list-style-name="WWNum17">
      <style:paragraph-properties fo:margin-top="0cm" fo:margin-bottom="0cm" style:contextual-spacing="false" fo:line-height="100%"/>
    </style:style>
    <style:style style:name="P61" style:family="paragraph" style:parent-style-name="Standard" style:list-style-name="WWNum17">
      <style:paragraph-properties fo:margin-top="0cm" fo:margin-bottom="0.494cm" style:contextual-spacing="false" fo:line-height="100%"/>
    </style:style>
    <style:style style:name="P62" style:family="paragraph" style:parent-style-name="Standard" style:list-style-name="WWNum18">
      <style:paragraph-properties fo:margin-top="0.494cm" fo:margin-bottom="0.494cm" style:contextual-spacing="false" fo:line-height="100%"/>
    </style:style>
    <style:style style:name="P63" style:family="paragraph" style:parent-style-name="Standard" style:list-style-name="WWNum19">
      <style:paragraph-properties fo:margin-top="0.494cm" fo:margin-bottom="0cm" style:contextual-spacing="false" fo:line-height="100%"/>
    </style:style>
    <style:style style:name="P64" style:family="paragraph" style:parent-style-name="Standard" style:list-style-name="WWNum19">
      <style:paragraph-properties fo:margin-top="0cm" fo:margin-bottom="0cm" style:contextual-spacing="false" fo:line-height="100%"/>
    </style:style>
    <style:style style:name="P65" style:family="paragraph" style:parent-style-name="Standard" style:list-style-name="WWNum19">
      <style:paragraph-properties fo:margin-top="0cm" fo:margin-bottom="0.494cm" style:contextual-spacing="false" fo:line-height="100%"/>
    </style:style>
    <style:style style:name="P66" style:family="paragraph" style:parent-style-name="Standard" style:list-style-name="WWNum20">
      <style:paragraph-properties fo:margin-top="0.494cm" fo:margin-bottom="0cm" style:contextual-spacing="false" fo:line-height="100%"/>
    </style:style>
    <style:style style:name="P67" style:family="paragraph" style:parent-style-name="Standard" style:list-style-name="WWNum20">
      <style:paragraph-properties fo:margin-top="0cm" fo:margin-bottom="0cm" style:contextual-spacing="false" fo:line-height="100%"/>
    </style:style>
    <style:style style:name="P68" style:family="paragraph" style:parent-style-name="Standard" style:list-style-name="WWNum20">
      <style:paragraph-properties fo:margin-top="0cm" fo:margin-bottom="0.494cm" style:contextual-spacing="false" fo:line-height="100%"/>
    </style:style>
    <style:style style:name="P69" style:family="paragraph" style:parent-style-name="Standard" style:list-style-name="WWNum21">
      <style:paragraph-properties fo:margin-top="0.494cm" fo:margin-bottom="0cm" style:contextual-spacing="false" fo:line-height="100%"/>
    </style:style>
    <style:style style:name="P70" style:family="paragraph" style:parent-style-name="Standard" style:list-style-name="WWNum21">
      <style:paragraph-properties fo:margin-top="0cm" fo:margin-bottom="0cm" style:contextual-spacing="false" fo:line-height="100%"/>
    </style:style>
    <style:style style:name="P71" style:family="paragraph" style:parent-style-name="Standard" style:list-style-name="WWNum21">
      <style:paragraph-properties fo:margin-top="0cm" fo:margin-bottom="0.494cm" style:contextual-spacing="false" fo:line-height="100%"/>
    </style:style>
    <style:style style:name="P72" style:family="paragraph" style:parent-style-name="Standard" style:list-style-name="WWNum22">
      <style:paragraph-properties fo:margin-top="0.494cm" fo:margin-bottom="0cm" style:contextual-spacing="false" fo:line-height="100%"/>
    </style:style>
    <style:style style:name="P73" style:family="paragraph" style:parent-style-name="Standard" style:list-style-name="WWNum22">
      <style:paragraph-properties fo:margin-top="0cm" fo:margin-bottom="0cm" style:contextual-spacing="false" fo:line-height="100%"/>
    </style:style>
    <style:style style:name="P74" style:family="paragraph" style:parent-style-name="Standard" style:list-style-name="WWNum22">
      <style:paragraph-properties fo:margin-top="0cm" fo:margin-bottom="0.494cm" style:contextual-spacing="false" fo:line-height="100%"/>
    </style:style>
    <style:style style:name="P75" style:family="paragraph" style:parent-style-name="Standard" style:list-style-name="WWNum23">
      <style:paragraph-properties fo:margin-top="0.494cm" fo:margin-bottom="0cm" style:contextual-spacing="false" fo:line-height="100%"/>
    </style:style>
    <style:style style:name="P76" style:family="paragraph" style:parent-style-name="Standard" style:list-style-name="WWNum23">
      <style:paragraph-properties fo:margin-top="0cm" fo:margin-bottom="0cm" style:contextual-spacing="false" fo:line-height="100%"/>
    </style:style>
    <style:style style:name="P77" style:family="paragraph" style:parent-style-name="Standard" style:list-style-name="WWNum23">
      <style:paragraph-properties fo:margin-top="0cm" fo:margin-bottom="0.494cm" style:contextual-spacing="false" fo:line-height="100%"/>
    </style:style>
    <style:style style:name="T1" style:family="text">
      <style:text-properties style:font-name-asian="Times New Roman1" style:language-asian="en" style:country-asian="GB" style:font-name-complex="Times New Roman1" style:font-size-complex="12pt"/>
    </style:style>
    <style:style style:name="T2" style:family="text">
      <style:text-properties fo:color="#0000ff" loext:opacity="100%" style:text-underline-style="solid" style:text-underline-width="auto" style:text-underline-color="font-color" style:font-name-asian="Times New Roman1" style:language-asian="en" style:country-asian="GB" style:font-name-complex="Times New Roman1" style:font-size-complex="12pt"/>
    </style:style>
    <style:style style:name="T3" style:family="text">
      <style:text-properties officeooo:rsid="0032971e"/>
    </style:style>
    <style:style style:name="T4" style:family="text">
      <style:text-properties fo:font-family="'Liberation Mono'" style:font-family-generic="modern" style:font-pitch="fixed"/>
    </style:style>
    <style:style style:name="T5" style:family="text">
      <style:text-properties fo:font-family="'Liberation Mono'" style:font-family-generic="modern" style:font-pitch="fixed" officeooo:rsid="0034a5c8"/>
    </style:style>
    <style:style style:name="T6" style:family="text">
      <style:text-properties officeooo:rsid="001a0d4f"/>
    </style:style>
    <style:style style:name="T7" style:family="text">
      <style:text-properties officeooo:rsid="001b04b5"/>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top"/>User guide</text:h>
      <text:list text:style-name="WWNum1">
        <text:list-item>
          <text:p text:style-name="P2" loext:marker-style-name="T1"><text:a xlink:type="simple" xlink:href="#_Overview" text:style-name="ListLabel_20_208" text:visited-style-name="ListLabel_20_208"><text:span text:style-name="T2">Overview</text:span></text:a></text:p>
        </text:list-item>
        <text:list-item>
          <text:p text:style-name="P3" loext:marker-style-name="T1"><text:a xlink:type="simple" xlink:href="#_Home_screen" text:style-name="ListLabel_20_208" text:visited-style-name="ListLabel_20_208"><text:span text:style-name="T2">Home screen</text:span></text:a></text:p>
        </text:list-item>
        <text:list-item>
          <text:p text:style-name="P3" loext:marker-style-name="T1"><text:a xlink:type="simple" xlink:href="#_Model_manager" text:style-name="ListLabel_20_208" text:visited-style-name="ListLabel_20_208"><text:span text:style-name="T2">Model manager</text:span></text:a></text:p>
        </text:list-item>
        <text:list-item>
          <text:p text:style-name="P3" loext:marker-style-name="T1"><text:a xlink:type="simple" xlink:href="#_Inputs" text:style-name="ListLabel_20_208" text:visited-style-name="ListLabel_20_208"><text:span text:style-name="T2">Inputs</text:span></text:a></text:p>
        </text:list-item>
        <text:list-item>
          <text:p text:style-name="P3" loext:marker-style-name="T1"><text:a xlink:type="simple" xlink:href="#_The_Mixer" text:style-name="ListLabel_20_208" text:visited-style-name="ListLabel_20_208"><text:span text:style-name="T2">Mixer</text:span></text:a></text:p>
        </text:list-item>
        <text:list-item>
          <text:p text:style-name="P3" loext:marker-style-name="T1"><text:a xlink:type="simple" xlink:href="#_Outputs" text:style-name="ListLabel_20_208" text:visited-style-name="ListLabel_20_208"><text:span text:style-name="T2">Outputs</text:span></text:a></text:p>
        </text:list-item>
        <text:list-item>
          <text:p text:style-name="P3" loext:marker-style-name="T1"><text:span text:style-name="T1">Extras </text:span><text:span text:style-name="T1"/></text:p>
          <text:list>
            <text:list-item>
              <text:p text:style-name="P3" loext:marker-style-name="T1"><text:a xlink:type="simple" xlink:href="#_Custom_curves" text:style-name="ListLabel_20_208" text:visited-style-name="ListLabel_20_208"><text:span text:style-name="T2">Custom curves</text:span></text:a></text:p>
            </text:list-item>
            <text:list-item>
              <text:p text:style-name="P3" loext:marker-style-name="T1"><text:a xlink:type="simple" xlink:href="#_Logical_switches" text:style-name="ListLabel_20_208" text:visited-style-name="ListLabel_20_208"><text:span text:style-name="T2">Logical switches</text:span></text:a></text:p>
            </text:list-item>
            <text:list-item>
              <text:p text:style-name="P3" loext:marker-style-name="T1"><text:a xlink:type="simple" xlink:href="#_Function_generators" text:style-name="ListLabel_20_208" text:visited-style-name="ListLabel_20_208"><text:span text:style-name="T2">Function generators</text:span></text:a></text:p>
            </text:list-item>
            <text:list-item>
              <text:p text:style-name="P3" loext:marker-style-name="T1"><text:a xlink:type="simple" xlink:href="#_Timers" text:style-name="ListLabel_20_208" text:visited-style-name="ListLabel_20_208"><text:span text:style-name="T2">Timers</text:span></text:a></text:p>
            </text:list-item>
            <text:list-item>
              <text:p text:style-name="P3" loext:marker-style-name="T1"><text:a xlink:type="simple" xlink:href="#_Counters" text:style-name="ListLabel_20_208" text:visited-style-name="ListLabel_20_208"><text:span text:style-name="T2">Counters</text:span></text:a></text:p>
            </text:list-item>
            <text:list-item>
              <text:p text:style-name="P3" loext:marker-style-name="T1"><text:a xlink:type="simple" xlink:href="#_Notifications" text:style-name="ListLabel_20_208" text:visited-style-name="ListLabel_20_208"><text:span text:style-name="T2">Notifications</text:span></text:a></text:p>
            </text:list-item>
            <text:list-item>
              <text:p text:style-name="P3" loext:marker-style-name="T1"><text:a xlink:type="simple" xlink:href="#_Safety_checks" text:style-name="ListLabel_20_208" text:visited-style-name="ListLabel_20_208"><text:span text:style-name="T2">Safety checks</text:span></text:a></text:p>
            </text:list-item>
            <text:list-item>
              <text:p text:style-name="P3" loext:marker-style-name="T1"><text:a xlink:type="simple" xlink:href="#_Trim_setup" text:style-name="ListLabel_20_208" text:visited-style-name="ListLabel_20_208"><text:span text:style-name="T2">Trim setup</text:span></text:a></text:p>
            </text:list-item>
            <text:list-item>
              <text:p text:style-name="P3" loext:marker-style-name="T1"><text:a xlink:type="simple" xlink:href="#_Flight_modes" text:style-name="ListLabel_20_208" text:visited-style-name="ListLabel_20_208"><text:span text:style-name="T2">Flight modes</text:span></text:a></text:p>
            </text:list-item>
          </text:list>
        </text:list-item>
        <text:list-item>
          <text:p text:style-name="P3" loext:marker-style-name="T1"><text:a xlink:type="simple" xlink:href="#_Telemetry" text:style-name="ListLabel_20_208" text:visited-style-name="ListLabel_20_208"><text:span text:style-name="T2">Telemetry</text:span></text:a></text:p>
        </text:list-item>
        <text:list-item>
          <text:p text:style-name="P3" loext:marker-style-name="T1"><text:a xlink:type="simple" xlink:href="#_System_settings" text:style-name="ListLabel_20_208" text:visited-style-name="ListLabel_20_208"><text:span text:style-name="T2">System</text:span></text:a></text:p>
        </text:list-item>
        <text:list-item>
          <text:p text:style-name="P4" loext:marker-style-name="T1"><text:a xlink:type="simple" xlink:href="#_Receiver" text:style-name="ListLabel_20_208" text:visited-style-name="ListLabel_20_208"><text:span text:style-name="T2">Receiver</text:span></text:a></text:p>
        </text:list-item>
      </text:list>
      <text:p text:style-name="Standard"/>
      <text:h text:style-name="P5" text:outline-level="1"><text:bookmark text:name="_Overview"/>Overview</text:h>
      <text:p text:style-name="P6">FreeTX is an open-source radio control system you can use for just about anything. It combines features from different RC systems and brings in new ideas too. It’s perfect for creators, hobbyists, and engineers. The main goal is to give you more freedom and choice with what you want to do.</text:p>
      <text:h text:style-name="Heading_20_2" text:outline-level="2">Default configuration</text:h>
      <text:p text:style-name="P7">By default, the system is configured with the following features.</text:p>
      <text:list text:style-name="WWNum2">
        <text:list-item>
          <text:p text:style-name="P8">10 stick input axes, 8 switches, 2 knobs</text:p>
        </text:list-item>
        <text:list-item>
          <text:p text:style-name="P9">40 mixer slots, 20 proportional RC channels</text:p>
        </text:list-item>
        <text:list-item>
          <text:p text:style-name="P9">10 custom curves, 10 max points per curve</text:p>
        </text:list-item>
        <text:list-item>
          <text:p text:style-name="P9">20 logical switches, 5 function generators, 3 timers, 5 counters</text:p>
        </text:list-item>
        <text:list-item>
          <text:p text:style-name="P9">10 custom notifications</text:p>
        </text:list-item>
        <text:list-item>
          <text:p text:style-name="P9">5 flight modes</text:p>
        </text:list-item>
        <text:list-item>
          <text:p text:style-name="P10"><text:span text:style-name="T3">8</text:span> telemetry sensor slots</text:p>
        </text:list-item>
      </text:list>
      <text:p text:style-name="P7">Many of these numbers are easily customisable in the source code, the limit being the available memory and I/O pins.</text:p>
      <text:h text:style-name="Heading_20_2" text:outline-level="2"><text:soft-page-break/>System architecture</text:h>
      <text:h text:style-name="Heading_20_4" text:outline-level="4">Hardware block diagram</text:h>
      <text:p text:style-name="P7"><draw:frame draw:style-name="fr1" draw:name="Picture 1" text:anchor-type="as-char" svg:width="15.875cm" svg:height="11.912cm" draw:z-index="0"><draw:image xlink:href="Pictures/10000001000003200000025864949D58.png" xlink:type="simple" xlink:show="embed" xlink:actuate="onLoad" draw:mime-type="image/png"/><svg:desc>D:\Ba\rc radio project\New stuff\Beta40\doc\images\tx_block_diagram.png</svg:desc></draw:frame></text:p>
      <text:h text:style-name="Heading_20_2" text:outline-level="2">RF protocol</text:h>
      <text:p text:style-name="P7">A custom RF protocol is used to communicate between the transmitter and receiver. The implementation builds on top of LoRa(R) transceivers. The documentation can be found in the Protocols folder.<text:line-break/>The main features are:-</text:p>
      <text:list text:style-name="WWNum3">
        <text:list-item>
          <text:p text:style-name="P11">10 bit encoding for all RC channels</text:p>
        </text:list-item>
        <text:list-item>
          <text:p text:style-name="P12">50 Hz update rate for all RC channels</text:p>
        </text:list-item>
        <text:list-item>
          <text:p text:style-name="P12">Frequency Hopping Spread Spectrum</text:p>
        </text:list-item>
        <text:list-item>
          <text:p text:style-name="P13">Telemetry support</text:p>
        </text:list-item>
      </text:list>
      <text:p text:style-name="Standard"/>
      <text:h text:style-name="P5" text:outline-level="1"><text:bookmark text:name="_Home_screen"/>Home screen</text:h>
      <text:p text:style-name="P14" loext:marker-style-name="T1"><text:span text:style-name="T1">The home screen is the default screen shown when operating the transmitter. It displays basic information such as the active model name, trims, status icons, transmitter battery, active flight mode, and up to four custom widgets.</text:span><text:span text:style-name="T1"/></text:p>
      <text:p text:style-name="P14" loext:marker-style-name="T1"><draw:frame draw:style-name="fr1" draw:name="Picture 2" text:anchor-type="as-char" svg:width="6.773cm" svg:height="3.387cm" draw:z-index="1"><draw:image xlink:href="Pictures/100000010000010000000080E175B7F1.png" xlink:type="simple" xlink:show="embed" xlink:actuate="onLoad" draw:mime-type="image/png"/><svg:desc>D:\Ba\rc radio project\New stuff\Beta40\doc\images\screenshots\home_screen.png</svg:desc></draw:frame></text:p>
      <text:p text:style-name="P14" loext:marker-style-name="T1"><text:span text:style-name="T1">Key actions on the home screen are as follows:</text:span><text:span text:style-name="T1"/></text:p>
      <text:list text:style-name="WWNum4">
        <text:list-item>
          <text:p text:style-name="P15" loext:marker-style-name="T1"><text:span text:style-name="T1">Down key </text:span><text:span text:style-name="T1"/></text:p>
          <text:list>
            <text:list-item>
              <text:p text:style-name="P16" loext:marker-style-name="T1"><text:span text:style-name="T1">Click: Opens the context menu.</text:span><text:span text:style-name="T1"/></text:p>
            </text:list-item>
            <text:list-item>
              <text:p text:style-name="P16" loext:marker-style-name="T1"><text:span text:style-name="T1">Hold: Quickly mutes/unmutes telemetry alarms.</text:span><text:span text:style-name="T1"/></text:p>
            </text:list-item>
          </text:list>
        </text:list-item>
        <text:list-item>
          <text:p text:style-name="P16" loext:marker-style-name="T1"><text:span text:style-name="T1">Up key </text:span><text:span text:style-name="T1"/></text:p>
          <text:list>
            <text:list-item>
              <text:p text:style-name="P16" loext:marker-style-name="T1"><text:span text:style-name="T1">Click: Opens the channel monitor.</text:span><text:span text:style-name="T1"/></text:p>
            </text:list-item>
            <text:list-item>
              <text:p text:style-name="P16" loext:marker-style-name="T1"><text:span text:style-name="T1">Hold: Enters the on-screen trim mode on handsets that lack physical trim buttons.</text:span><text:span text:style-name="T1"/></text:p>
            </text:list-item>
          </text:list>
        </text:list-item>
        <text:list-item>
          <text:p text:style-name="P16" loext:marker-style-name="T1"><text:span text:style-name="T1">Select Key </text:span><text:span text:style-name="T1"/></text:p>
          <text:list>
            <text:list-item>
              <text:p text:style-name="P16" loext:marker-style-name="T1"><text:span text:style-name="T1">Click: Opens the main menu.</text:span><text:span text:style-name="T1"/></text:p>
            </text:list-item>
            <text:list-item>
              <text:p text:style-name="P17" loext:marker-style-name="T1"><text:span text:style-name="T1">Hold: Navigate back. This is also the default behaviour in all screens.</text:span><text:span text:style-name="T1"/></text:p>
            </text:list-item>
          </text:list>
        </text:list-item>
      </text:list>
      <text:p text:style-name="Standard"/>
      <text:h text:style-name="P5" text:outline-level="1"><text:bookmark text:name="_Model_manager"/>Model manager</text:h>
      <text:p text:style-name="P14" loext:marker-style-name="T1"><draw:frame draw:style-name="fr1" draw:name="Picture 4" text:anchor-type="as-char" svg:width="6.773cm" svg:height="3.81cm" draw:z-index="2"><draw:image xlink:href="Pictures/1000000100000100000000903184CEF7.png" xlink:type="simple" xlink:show="embed" xlink:actuate="onLoad" draw:mime-type="image/png"/><svg:desc>D:\Ba\rc radio project\New stuff\Beta40\doc\images\screenshots\model_manager.png</svg:desc></draw:frame><text:span text:style-name="T1"><text:s text:c="4"/></text:span><draw:frame draw:style-name="fr1" draw:name="Picture 3" text:anchor-type="as-char" svg:width="6.773cm" svg:height="3.81cm" draw:z-index="3"><draw:image xlink:href="Pictures/100000010000010000000090EEAB5E75.png" xlink:type="simple" xlink:show="embed" xlink:actuate="onLoad" draw:mime-type="image/png"/><svg:desc>D:\Ba\rc radio project\New stuff\Beta40\doc\images\screenshots\model_manager_context_menu_active.png</svg:desc></draw:frame></text:p>
      <text:p text:style-name="P14" loext:marker-style-name="T1"><text:span text:style-name="T1">The model manager enables various actions, such as creating, loading, and deleting models. By default, model settings are stored in the EEPROM.</text:span><text:span text:style-name="T1"/></text:p>
      <text:p text:style-name="P14" loext:marker-style-name="T1"><text:span text:style-name="T1">SD cards are also supported and are useful for backing up and restoring models. Model data on the SD card is stored in a human-readable text format similar to YAML.</text:span><text:span text:style-name="T1"/></text:p>
      <text:p text:style-name="P14" loext:marker-style-name="T1"><text:span text:style-name="T1">Note:</text:span><text:span text:style-name="T1"/></text:p>
      <text:list text:style-name="WWNum5">
        <text:list-item>
          <text:p text:style-name="P18" loext:marker-style-name="T1"><text:span text:style-name="T1">An external EEPROM is recommended but not mandatory. However, without it, the system will only have one model slot available, which makes it cumbersome to switch between different models, as we would always need to rely on the SD card to load a different model.</text:span><text:span text:style-name="T1"/></text:p>
        </text:list-item>
        <text:list-item>
          <text:p text:style-name="P19" loext:marker-style-name="T1"><text:span text:style-name="T1">Before updating the firmware in the transmitter, always back up your models to the SD card to avoid any potential data loss or corruption.</text:span><text:span text:style-name="T1"/></text:p>
        </text:list-item>
        <text:list-item>
          <text:p text:style-name="P19" loext:marker-style-name="T1"><text:span text:style-name="T1">The "Copy from" feature only works between models of the same type.</text:span><text:span text:style-name="T1"/></text:p>
        </text:list-item>
        <text:list-item>
          <text:p text:style-name="P20" loext:marker-style-name="T1"><text:span text:style-name="T1">Loading or selecting a new model disables RF output for safety reasons; therefore, RF output must be manually re-enabled afterward.</text:span><text:span text:style-name="T1"/></text:p>
        </text:list-item>
      </text:list>
      <text:p text:style-name="Standard"/>
      <text:h text:style-name="P5" text:outline-level="1"><text:bookmark text:name="_Inputs"/>Inputs</text:h>
      <text:p text:style-name="P14" loext:marker-style-name="T1"><text:span text:style-name="T1">The inputs screen allows setting dual rates and expo, throttle curve, as well as showing the values from the physical controls.</text:span><text:span text:style-name="T1"/></text:p>
      <text:p text:style-name="P14" loext:marker-style-name="T1"><draw:frame draw:style-name="fr1" draw:name="Picture 6" text:anchor-type="as-char" svg:width="16.011cm" svg:height="5.851cm" draw:z-index="4"><draw:image xlink:href="Pictures/100000010000034000000130FD6B03EE.png" xlink:type="simple" xlink:show="embed" xlink:actuate="onLoad" draw:mime-type="image/png"/><svg:desc>D:\Ba\rc radio project\New stuff\Beta40\doc\images\screenshots\inputs.png</svg:desc></draw:frame></text:p>
      <text:list text:style-name="WWNum6">
        <text:list-item>
          <text:p text:style-name="P21" loext:marker-style-name="T1"><text:span text:style-name="T1">For model type 'Airplane', the naming used for the main controls is Ail, Ele, Rud, Thr.</text:span><text:span text:style-name="T1"/></text:p>
        </text:list-item>
        <text:list-item>
          <text:p text:style-name="P22" loext:marker-style-name="T1"><text:span text:style-name="T1">For model type 'Multicopter', the nomenclature changes to Roll, Pitch, Yaw, Thr.</text:span><text:span text:style-name="T1"/></text:p>
        </text:list-item>
        <text:list-item>
          <text:p text:style-name="P22" loext:marker-style-name="T1"><text:span text:style-name="T1">The sources for the above inputs may default to a different order based on the chosen stick mode in System settings.</text:span><text:span text:style-name="T1"/></text:p>
        </text:list-item>
        <text:list-item>
          <text:p text:style-name="P23" loext:marker-style-name="T1"><text:span text:style-name="T1">The system accepts both 2-position and 3-position switches, as well as their momentary variants.</text:span><text:span text:style-name="T1"/></text:p>
        </text:list-item>
      </text:list>
      <text:p text:style-name="P14" loext:marker-style-name="T1"><text:span text:style-name="T1">The image below shows a typical layout of the transmitter.</text:span><text:span text:style-name="T1"/></text:p>
      <text:p text:style-name="P14" loext:marker-style-name="T1"><draw:frame draw:style-name="fr1" draw:name="Picture 5" text:anchor-type="as-char" svg:width="11.218cm" svg:height="10.102cm" draw:z-index="5"><draw:image xlink:href="Pictures/1000000100000320000002D0B1F67A83.png" xlink:type="simple" xlink:show="embed" xlink:actuate="onLoad" draw:mime-type="image/png"/><svg:desc>D:\Ba\rc radio project\New stuff\Beta40\doc\images\controls_description.png</svg:desc></draw:frame></text:p>
      <text:h text:style-name="P5" text:outline-level="1"><text:bookmark text:name="_The_Mixer"/>The Mixer</text:h>
      <text:p text:style-name="P7">The mixer is where the inputs (mixer sources) get linked to the output channels (servos, etc.). This controller features a mixer system that draws inspiration from that found in OpenTX(R) based RC transmitters, though not directly compatible.</text:p>
      <text:p text:style-name="P7"><draw:frame draw:style-name="fr1" draw:name="Picture 11" text:anchor-type="as-char" svg:width="13.97cm" svg:height="7.62cm" draw:z-index="6"><draw:image xlink:href="Pictures/100000000000021000000120F3DE5D98.png" xlink:type="simple" xlink:show="embed" xlink:actuate="onLoad" draw:mime-type="image/png"/><svg:desc>D:\Ba\rc radio project\New stuff\Beta40\doc\images\screenshots\mixer.png</svg:desc></draw:frame></text:p>
      <text:h text:style-name="Heading_20_2" text:outline-level="2">Mixer sources</text:h>
      <text:p text:style-name="P7">Mixer sources can be any of the following:</text:p>
      <text:list text:style-name="WWNum7">
        <text:list-item>
          <text:p text:style-name="P24">Raw stick axes (X1, Y1, X2, Y2, ...)</text:p>
        </text:list-item>
        <text:list-item>
          <text:p text:style-name="P25">Processed sticks (Rud/Yaw, Thr, Ail/Roll, Ele/Pitch)</text:p>
        </text:list-item>
        <text:list-item>
          <text:p text:style-name="P25">Knobs (KnobA, KnobB)</text:p>
        </text:list-item>
        <text:list-item>
          <text:p text:style-name="P25">Constants (Max)</text:p>
        </text:list-item>
        <text:list-item>
          <text:p text:style-name="P25">Function generators (Fgen1, Fgen2, ...)</text:p>
        </text:list-item>
        <text:list-item>
          <text:p text:style-name="P25">Trims (X1Trim, Y1Trim, X2Trim, Y2Trim)</text:p>
        </text:list-item>
        <text:list-item>
          <text:p text:style-name="P25">Physical switches (SwA, SwB, ...)</text:p>
        </text:list-item>
        <text:list-item>
          <text:p text:style-name="P25">Logical switches (L1, L2, ...)</text:p>
        </text:list-item>
        <text:list-item>
          <text:p text:style-name="P25">Channels (Ch1, Ch2, ...)</text:p>
        </text:list-item>
        <text:list-item>
          <text:p text:style-name="P26">Virtual channels (Virt1, Virt2, ...)</text:p>
        </text:list-item>
      </text:list>
      <text:p text:style-name="P7">Counters can also be used as inputs in the mixer, although they are not classified as true mixer sources.</text:p>
      <text:h text:style-name="Heading_20_2" text:outline-level="2">Mixer fields</text:h>
      <text:list text:style-name="WWNum8">
        <text:list-item>
          <text:p text:style-name="P27">Output: The channel that is to be affected by the mix. If none, the mix is inactive and is not computed.</text:p>
        </text:list-item>
        <text:list-item>
          <text:p text:style-name="P28">Switch: The control switch to turn on or off the mix. The mix is always active if no is switch specified.</text:p>
        </text:list-item>
        <text:list-item>
          <text:p text:style-name="P28">Operation: Add, Multiply, Replace, Hold.</text:p>
        </text:list-item>
        <text:list-item>
          <text:p text:style-name="P28">Input: This is the mixer source.</text:p>
        </text:list-item>
        <text:list-item>
          <text:p text:style-name="P28"><text:soft-page-break/>Weight: Determines how much of an effect the input has on the output. -100 to 100.</text:p>
        </text:list-item>
        <text:list-item>
          <text:p text:style-name="P28">Offset: The input is offset by this value after the weight has been applied. -100 to 100.</text:p>
        </text:list-item>
        <text:list-item>
          <text:p text:style-name="P28">Curve: Differential, Expo, Function, Custom curve.</text:p>
        </text:list-item>
        <text:list-item>
          <text:p text:style-name="P28">Curve value: Differential {-100 to 100}, Expo {-100 to 100}, Function {x&gt;0, x&lt;0, |x|}, Curve name if custom curve.</text:p>
        </text:list-item>
        <text:list-item>
          <text:p text:style-name="P28">Trim: Whether to add trim or not.</text:p>
        </text:list-item>
        <text:list-item>
          <text:p text:style-name="P28">F-Mode: The flight mode in which the mix applies.</text:p>
        </text:list-item>
        <text:list-item>
          <text:p text:style-name="P28">Delay Up and Down: This is used to delay the input. 0 to 60 seconds.</text:p>
        </text:list-item>
        <text:list-item>
          <text:p text:style-name="P29">Slow Up and Down: This when non-zero specifies how fast the input changes. 0 to 60 seconds.</text:p>
        </text:list-item>
      </text:list>
      <text:h text:style-name="Heading_20_2" text:outline-level="2">Order of mixer operations</text:h>
      <text:p text:style-name="P7"><draw:frame draw:style-name="fr1" draw:name="Picture 10" text:anchor-type="as-char" svg:width="4.928cm" svg:height="10.275cm" draw:z-index="7"><draw:image xlink:href="Pictures/10000000000000F8000002059F421693.png" xlink:type="simple" xlink:show="embed" xlink:actuate="onLoad" draw:mime-type="image/png"/><svg:desc>D:\Ba\rc radio project\New stuff\Beta40\doc\images\Drawing1.png</svg:desc></draw:frame></text:p>
      <text:h text:style-name="Heading_20_2" text:outline-level="2">Important safety note</text:h>
      <text:p text:style-name="P7">When editing mixes, it is recommended to disable RF output or remove propellers first. <text:line-break/>This is because all changes/adjustments made are applied instantly and may bring surprises.</text:p>
      <text:h text:style-name="Heading_20_2" text:outline-level="2">Example mixes</text:h>
      <text:p text:style-name="P7">Note:</text:p>
      <text:list text:style-name="WWNum9">
        <text:list-item>
          <text:p text:style-name="P30">The convention used in these examples is -ve for left/downward going control surfaces, +ve for right/upward going control surfaces. For example if the Ail stick is moved right, the left aileron moves down and the right aileron moves up. Hence we use a negative weight for the left aileron and a positive weight for the right aileron.</text:p>
        </text:list-item>
        <text:list-item>
          <text:p text:style-name="P31"><text:soft-page-break/>If a servo is moving in wrong direction, reversing the direction in Outputs screen solves this.</text:p>
        </text:list-item>
        <text:list-item>
          <text:p text:style-name="P32">The Mixer is all about control logic. Any mechanical differences should be handled in the Outputs screen and not inside the Mixer.</text:p>
        </text:list-item>
      </text:list>
      <text:p text:style-name="P33"><text:a xlink:type="simple" xlink:href="#_Example_1:_Basic" text:style-name="Internet_20_link" text:visited-style-name="Visited_20_Internet_20_Link"><text:span text:style-name="Internet_20_link">1. Basic 4 channel</text:span></text:a><text:line-break/><text:a xlink:type="simple" xlink:href="#_Example_2:_Elevon" text:style-name="Internet_20_link" text:visited-style-name="Visited_20_Internet_20_Link"><text:span text:style-name="Internet_20_link">2. Elevon</text:span></text:a><text:line-break/><text:a xlink:type="simple" xlink:href="#_Example_3:_Vtail" text:style-name="Internet_20_link" text:visited-style-name="Visited_20_Internet_20_Link"><text:span text:style-name="Internet_20_link">3. Vtail</text:span></text:a><text:line-break/><text:a xlink:type="simple" xlink:href="#_Example_4:_Aileron" text:style-name="Internet_20_link" text:visited-style-name="Visited_20_Internet_20_Link"><text:span text:style-name="Internet_20_link">4. Aileron differential</text:span></text:a><text:line-break/><text:a xlink:type="simple" xlink:href="#_Example_5:_Tailerons" text:style-name="Internet_20_link" text:visited-style-name="Visited_20_Internet_20_Link"><text:span text:style-name="Internet_20_link">5. Tailerons</text:span></text:a><text:line-break/><text:a xlink:type="simple" xlink:href="#_Example_6:_Flaperons" text:style-name="Internet_20_link" text:visited-style-name="Visited_20_Internet_20_Link"><text:span text:style-name="Internet_20_link">6. Flaperons</text:span></text:a><text:line-break/><text:a xlink:type="simple" xlink:href="#Example 7: Crow braking|outline" text:style-name="Internet_20_link" text:visited-style-name="Visited_20_Internet_20_Link"><text:span text:style-name="Internet_20_link">7. </text:span><text:bookmark text:name="_GoBack"/><text:span text:style-name="Internet_20_link">Crow braking</text:span></text:a><text:line-break/><text:a xlink:type="simple" xlink:href="#Example 8: Flaps working as ailerons|outline" text:style-name="Internet_20_link" text:visited-style-name="Visited_20_Internet_20_Link"><text:span text:style-name="Internet_20_link">8. Flaps working as ailerons</text:span></text:a><text:line-break/><text:a xlink:type="simple" xlink:href="#Example 9: Differential thrust|outline" text:style-name="Internet_20_link" text:visited-style-name="Visited_20_Internet_20_Link"><text:span text:style-name="Internet_20_link">9. Differential thrust</text:span></text:a><text:line-break/><text:a xlink:type="simple" xlink:href="#Example 10: Throttle elevator mixing|outline" text:style-name="Internet_20_link" text:visited-style-name="Visited_20_Internet_20_Link"><text:span text:style-name="Internet_20_link">10. Throttle elevator mixing</text:span></text:a><text:line-break/><text:a xlink:type="simple" xlink:href="#Example 11: Variable steering depending on throttle position|outline" text:style-name="Internet_20_link" text:visited-style-name="Visited_20_Internet_20_Link"><text:span text:style-name="Internet_20_link">11. Variable steering depending on throttle</text:span></text:a><text:line-break/><text:a xlink:type="simple" xlink:href="#Example 12: Adjust idle throttle with knob|outline" text:style-name="Internet_20_link" text:visited-style-name="Visited_20_Internet_20_Link"><text:span text:style-name="Internet_20_link">12. Adjust idle throttle with knob</text:span></text:a><text:line-break/><text:a xlink:type="simple" xlink:href="#Example 13: Adjust maximum throttle with knob|outline" text:style-name="Internet_20_link" text:visited-style-name="Visited_20_Internet_20_Link"><text:span text:style-name="Internet_20_link">13. Adjust maximum throttle with knob</text:span></text:a><text:line-break/><text:a xlink:type="simple" xlink:href="#Example 14: Simple throttle cut|outline" text:style-name="Internet_20_link" text:visited-style-name="Visited_20_Internet_20_Link"><text:span text:style-name="Internet_20_link">14. Simple throttle cut</text:span></text:a><text:line-break/><text:a xlink:type="simple" xlink:href="#Example 15: Sticky throttle cut|outline" text:style-name="Internet_20_link" text:visited-style-name="Visited_20_Internet_20_Link"><text:span text:style-name="Internet_20_link">15. Sticky throttle cut</text:span></text:a><text:line-break/><text:a xlink:type="simple" xlink:href="#Example 16: Landing gear sequencer (gear doors stay open after gear is extended)|outline" text:style-name="Internet_20_link" text:visited-style-name="Visited_20_Internet_20_Link"><text:span text:style-name="Internet_20_link">16. Landing gear sequencer</text:span></text:a><text:line-break/><text:a xlink:type="simple" xlink:href="#Example 17: Landing gear sequencer (gear doors close after gear is extended)|outline" text:style-name="Internet_20_link" text:visited-style-name="Visited_20_Internet_20_Link"><text:span text:style-name="Internet_20_link">17. Landing gear sequencer - advanced</text:span></text:a><text:line-break/><text:a xlink:type="simple" xlink:href="#Example 18: Servo tester|outline" text:style-name="Internet_20_link" text:visited-style-name="Visited_20_Internet_20_Link"><text:span text:style-name="Internet_20_link">18. Servo tester</text:span></text:a><text:line-break/><text:a xlink:type="simple" xlink:href="#Example 19: Random servo motion generator|outline" text:style-name="Internet_20_link" text:visited-style-name="Visited_20_Internet_20_Link"><text:span text:style-name="Internet_20_link">19. Random servo motion generator</text:span></text:a><text:line-break/><text:a xlink:type="simple" xlink:href="#Example 20: Random servo motion generator (advanced version)|outline" text:style-name="Internet_20_link" text:visited-style-name="Visited_20_Internet_20_Link"><text:span text:style-name="Internet_20_link">20. Random servo motion generator - advanced</text:span></text:a><text:line-break/><text:a xlink:type="simple" xlink:href="#Example 21: Oscillation without using the built-in function generator|outline" text:style-name="Internet_20_link" text:visited-style-name="Visited_20_Internet_20_Link"><text:span text:style-name="Internet_20_link">21. Oscillator from scratch</text:span></text:a><text:line-break/><text:a xlink:type="simple" xlink:href="#Example 22: Aileron rudder mixing with automatic switching|outline" text:style-name="Internet_20_link" text:visited-style-name="Visited_20_Internet_20_Link"><text:span text:style-name="Internet_20_link">22. Automatic aileron rudder mixing</text:span></text:a><text:line-break/><text:a xlink:type="simple" xlink:href="#Example 23: Adjust aileron differential with the knob|outline" text:style-name="Internet_20_link" text:visited-style-name="Visited_20_Internet_20_Link"><text:span text:style-name="Internet_20_link">23. Adjust aileron differential with knob</text:span></text:a></text:p>
      <text:h text:style-name="Heading_20_3" text:outline-level="3"><text:bookmark text:name="_Example_1:_Basic"/>Example 1: Basic 4 channel</text:h>
      <text:p text:style-name="P34">Assuming Aileron servo in Ch1, Elevator servo in Ch2, Throttle in Ch3, Rudder servo in Ch4</text:p>
      <text:p text:style-name="code_20_Style1">1. Ch1 <text:s/>Add <text:s/>Ail (Weight 100)</text:p>
      <text:p text:style-name="code_20_Style1">2. Ch2 <text:s/>Add <text:s/>Ele (Weight -100)</text:p>
      <text:p text:style-name="code_20_Style1">3. Ch3 <text:s/>Add <text:s/>Thr (Weight 100)</text:p>
      <text:p text:style-name="code_20_Style1">4. Ch4 <text:s/>Add <text:s/>Rud (Weight 100)</text:p>
      <text:p text:style-name="Standard"/>
      <text:h text:style-name="Heading_20_3" text:outline-level="3"><text:bookmark text:name="_Example_2:_Elevon"/>Example 2: Elevon</text:h>
      <text:p text:style-name="P7">Left servo in Ch1, right servo in Ch2</text:p>
      <text:p text:style-name="code_20_Style1"><text:span text:style-name="HTML_20_Code"><text:span text:style-name="T4">1. Ch1 <text:s/>Add <text:s/>Ail (Weight -50)</text:span></text:span></text:p>
      <text:p text:style-name="code_20_Style1"><text:span text:style-name="HTML_20_Code"><text:span text:style-name="T4">2. Ch1 <text:s/>Add <text:s/>Ele (Weight -50)</text:span></text:span></text:p>
      <text:p text:style-name="code_20_Style1"><text:span text:style-name="HTML_20_Code"><text:span text:style-name="T4">3. Ch2 <text:s/>Add <text:s/>Ail (Weight 50)</text:span></text:span></text:p>
      <text:p text:style-name="code_20_Style1"><text:span text:style-name="HTML_20_Code"><text:span text:style-name="T4">4. Ch2 <text:s/>Add <text:s/>Ele (Weight -50)</text:span></text:span></text:p>
      <text:p text:style-name="Standard"><text:span text:style-name="HTML_20_Code"/></text:p>
      <text:h text:style-name="Heading_20_3" text:outline-level="3"><text:bookmark text:name="_Example_3:_Vtail"/>Example 3: Vtail</text:h>
      <text:p text:style-name="P7">Left servo in Ch2, right servo in Ch4</text:p>
      <text:p text:style-name="code_20_Style1"><text:soft-page-break/><text:span text:style-name="HTML_20_Code"><text:span text:style-name="T4">1. Ch2 <text:s/>Add <text:s/>Rud (Weight 50)</text:span></text:span></text:p>
      <text:p text:style-name="code_20_Style1"><text:span text:style-name="HTML_20_Code"><text:span text:style-name="T4">2. Ch2 <text:s/>Add <text:s/>Ele (Weight -50)</text:span></text:span></text:p>
      <text:p text:style-name="code_20_Style1"><text:span text:style-name="HTML_20_Code"><text:span text:style-name="T4">3. Ch4 <text:s/>Add <text:s/>Rud (Weight -50)</text:span></text:span></text:p>
      <text:p text:style-name="code_20_Style1"><text:span text:style-name="HTML_20_Code"><text:span text:style-name="T4">4. Ch4 <text:s/>Add <text:s/>Ele (Weight -50)</text:span></text:span></text:p>
      <text:p text:style-name="Standard"><text:span text:style-name="HTML_20_Code"/></text:p>
      <text:h text:style-name="Heading_20_3" text:outline-level="3"><text:bookmark text:name="_Example_4:_Aileron"/>Example 4: Aileron differential</text:h>
      <text:p text:style-name="P7">Left aileron in Ch1, right aileron in Ch8. We want the downward going aileron to get less displaced than the upward going aileron. Due to differences in lift and air pressure on the top and bottom wing surfaces, the aileron surface produces more drag when it moves down than when it moves up. This tends to cause an adverse yaw effect hence the need for aileron differential.</text:p>
      <text:p text:style-name="code_20_Style1"><text:span text:style-name="HTML_20_Code"><text:span text:style-name="T4">1. Ch1 <text:s/>Add <text:s/>Ail (Weight -100, Diff 30)</text:span></text:span></text:p>
      <text:p text:style-name="code_20_Style1"><text:span text:style-name="HTML_20_Code"><text:span text:style-name="T4">2. Ch8 <text:s/>Add <text:s/>Ail (Weight 100, Diff 30)</text:span></text:span></text:p>
      <text:p text:style-name="Standard"/>
      <text:h text:style-name="Heading_20_3" text:outline-level="3"><text:bookmark text:name="_Example_5:_Tailerons"/>Example 5: Tailerons</text:h>
      <text:p text:style-name="P7">Left Elevator servo in Ch6, Right Elevator servo in Ch7. The mix is turned on/off with SwG.</text:p>
      <text:p text:style-name="code_20_Style1"><text:span text:style-name="HTML_20_Code"><text:span text:style-name="T4">1. Ch6 <text:s/>Add <text:s/>Ele (Weight -60)</text:span></text:span></text:p>
      <text:p text:style-name="code_20_Style1"><text:span text:style-name="HTML_20_Code"><text:span text:style-name="T4">2. Ch6 <text:s/>Add <text:s/>Ail (Weight -40, Switch SwG_Down)</text:span></text:span></text:p>
      <text:p text:style-name="code_20_Style1"><text:span text:style-name="HTML_20_Code"><text:span text:style-name="T4">3. Ch7 <text:s/>Add <text:s/>Ele (Weight -60)</text:span></text:span></text:p>
      <text:p text:style-name="code_20_Style1"><text:span text:style-name="HTML_20_Code"><text:span text:style-name="T4">4. Ch7 <text:s/>Add <text:s/>Ail (Weight 40, Switch SwG_Down)</text:span></text:span></text:p>
      <text:p text:style-name="Standard"><text:span text:style-name="HTML_20_Code"/></text:p>
      <text:h text:style-name="Heading_20_3" text:outline-level="3"><text:bookmark text:name="_Example_6:_Flaperons"/>Example 6: Flaperons</text:h>
      <text:p text:style-name="P7">Left aileron in Ch1, right aileron in Ch8. Using SwC to operate the flaperons. <text:line-break/>When SwC is in upper position, flaperons are off. In middle position half flaperons, and in lower position full flaperons. <text:line-break/>For smooth flaperon deployment, we use the slow up/down feature.</text:p>
      <text:p text:style-name="code_20_Style1"><text:span text:style-name="HTML_20_Code"><text:span text:style-name="T4">1. Ch1 <text:s/>Add <text:s/>Ail (Weight -100, Diff 30)</text:span></text:span></text:p>
      <text:p text:style-name="code_20_Style1"><text:span text:style-name="HTML_20_Code"><text:span text:style-name="T4">2. Ch1 <text:s/>Add <text:s/>SwC (Weight -40, Offset -40, SlowUp 1 s, SlowDown 1 s)</text:span></text:span></text:p>
      <text:p text:style-name="code_20_Style1"><text:span text:style-name="HTML_20_Code"><text:span text:style-name="T4">3. Ch8 <text:s/>Add <text:s/>Ail (Weight 100, Diff 30)</text:span></text:span></text:p>
      <text:p text:style-name="code_20_Style1"><text:span text:style-name="HTML_20_Code"><text:span text:style-name="T4">4. Ch8 <text:s/>Add <text:s/>SwC (Weight -40, Offset -40, SlowUp 1 s, SlowDown 1 s)</text:span></text:span></text:p>
      <text:p text:style-name="Standard"/>
      <text:h text:style-name="Heading_20_3" text:outline-level="3">Example 7: Crow braking</text:h>
      <text:p text:style-name="P7">Left ail servo in Ch1, Right Ail servo in Ch8, left flap servo in Ch5, right flap servo in Ch6. <text:line-break/>Using the three position SwC for operation. Normal aileron action occurs when SwC is in upper or middle position. Half flaps are deployed when SwC is in middle position. When SwC is in lower position, both ailerons move upward and full flaps are deployed.</text:p>
      <text:p text:style-name="code_20_Style1"><text:span text:style-name="HTML_20_Code"><text:span text:style-name="T4">1. Ch1 <text:s text:c="2"/>Add <text:s/>Ail (Weight -100, Diff 30)</text:span></text:span></text:p>
      <text:p text:style-name="code_20_Style1"><text:span text:style-name="HTML_20_Code"><text:span text:style-name="T4">2. Ch1 <text:s text:c="2"/>Add <text:s/>SwC (Weight 60, Func x&gt;0, SlowUp 1 s, SlowDown 1 s)</text:span></text:span></text:p>
      <text:p text:style-name="code_20_Style1"><text:span text:style-name="HTML_20_Code"><text:span text:style-name="T4">3. Ch8 <text:s text:c="2"/>Add <text:s/>Ail (Weight 100, Diff 30)</text:span></text:span></text:p>
      <text:p text:style-name="code_20_Style1"><text:span text:style-name="HTML_20_Code"><text:span text:style-name="T4">4. Ch8 <text:s text:c="2"/>Add <text:s/>SwC (Weight 60, Func x&gt;0, SlowUp 1 s, SlowDown 1 s)</text:span></text:span></text:p>
      <text:p text:style-name="code_20_Style1"><text:span text:style-name="HTML_20_Code"><text:span text:style-name="T4">5. Ch5 <text:s text:c="2"/>Add <text:s/>SwC (Weight -50, Offset -50, SlowUp 1 s, SlowDown 1 s)</text:span></text:span></text:p>
      <text:p text:style-name="code_20_Style1"><text:span text:style-name="HTML_20_Code"><text:span text:style-name="T4">6. Ch6 <text:s text:c="2"/>Add <text:s/>Ch5 (Weight 100)</text:span></text:span></text:p>
      <text:p text:style-name="Standard"><text:span text:style-name="HTML_20_Code"/></text:p>
      <text:h text:style-name="Heading_20_3" text:outline-level="3"><text:soft-page-break/>Example 8: Flaps working as ailerons</text:h>
      <text:p text:style-name="P7">This mix allows the entire trailing edge of the wing (aileron and flap) to operate as ailerons. Assuming the left flap servo in Ch5, right flap servo in Ch6. <text:line-break/>Using a two position switch e.g. SwD to switch between flap mode and aileron mode. <text:line-break/>Using the three position SwC to set the flap position in flap mode.</text:p>
      <text:p text:style-name="code_20_Style1"><text:span text:style-name="HTML_20_Code"><text:span text:style-name="T4">1. Ch5 <text:s text:c="2"/>Add <text:s text:c="3"/>SwC (Weight -50, <text:s/>Offset -50)</text:span></text:span></text:p>
      <text:p text:style-name="code_20_Style1"><text:span text:style-name="HTML_20_Code"><text:span text:style-name="T4">2. Ch5 <text:s text:c="2"/>RplcW <text:s/>Ail (Weight -100, Diff 20, Switch SwD_Down)</text:span></text:span></text:p>
      <text:p text:style-name="code_20_Style1"><text:span text:style-name="HTML_20_Code"><text:span text:style-name="T4">3. Ch6 <text:s text:c="2"/>Add <text:s text:c="3"/>SwC (Weight -50, <text:s/>Offset -50)</text:span></text:span></text:p>
      <text:p text:style-name="code_20_Style1"><text:span text:style-name="HTML_20_Code"><text:span text:style-name="T4">4. Ch6 <text:s text:c="2"/>RplcW <text:s/>Ail (Weight 100, <text:s/>Diff 20, Switch SwD_Down)</text:span></text:span></text:p>
      <text:p text:style-name="Standard"><text:span text:style-name="HTML_20_Code"/></text:p>
      <text:h text:style-name="Heading_20_3" text:outline-level="3">Example 9: Differential thrust</text:h>
      <text:p text:style-name="P7">Left motor in Ch3, right motor in Ch7. We can use a switch e.g. SwE to turn the differential thrust off while in the air. Also assume the Rud source is the X1 axis</text:p>
      <text:p text:style-name="code_20_Style1"><text:span text:style-name="HTML_20_Code"><text:span text:style-name="T4">1. Ch3 <text:s/>Add <text:s/>Thr (Weight 100)</text:span></text:span></text:p>
      <text:p text:style-name="code_20_Style1"><text:span text:style-name="HTML_20_Code"><text:span text:style-name="T4">2. Ch3 <text:s/>Add <text:s/>X1 <text:s/>(Weight 40, Switch SwE_Down)</text:span></text:span></text:p>
      <text:p text:style-name="code_20_Style1"><text:span text:style-name="HTML_20_Code"><text:span text:style-name="T4">3. Ch7 <text:s/>Add <text:s/>Thr (Weight 100)</text:span></text:span></text:p>
      <text:p text:style-name="code_20_Style1"><text:span text:style-name="HTML_20_Code"><text:span text:style-name="T4">4. Ch7 <text:s/>Add <text:s/>X1 <text:s/>(Weight -40, Switch SwE_Down)</text:span></text:span></text:p>
      <text:p text:style-name="P7">For safety, we also need to set Failsafe for both Ch3 and Ch7 in the 'Outputs' screen.<text:line-break/>We can also add throttle cut by specifying an override switch and a value of -100.</text:p>
      <text:h text:style-name="Heading_20_3" text:outline-level="3">Example 10: Throttle elevator mixing</text:h>
      <text:p text:style-name="P7">When the throttle is increased, some down elevator can be added to counteract the tendency of the model gaining altitude when the throttle increases.</text:p>
      <text:p text:style-name="code_20_Style1"><text:span text:style-name="HTML_20_Code"><text:span text:style-name="T4">1. Ch2 <text:s/>Add <text:s/>Ele (Weight -100) <text:s/></text:span></text:span></text:p>
      <text:p text:style-name="code_20_Style1"><text:span text:style-name="HTML_20_Code"><text:span text:style-name="T4">2. Ch2 <text:s/>Add <text:s/>Thr (Weight -20, Offset -20)</text:span></text:span></text:p>
      <text:p text:style-name="Standard"><text:span text:style-name="HTML_20_Code"/></text:p>
      <text:h text:style-name="Heading_20_3" text:outline-level="3">Example 11: Variable steering depending on throttle position</text:h>
      <text:p text:style-name="P7">We want the steering response to reduce with increasing throttle. Assuming we use the X1 axis to steer, Y1 axis as our throttle source, and the steering servo is on Ch6,</text:p>
      <text:p text:style-name="code_20_Style1"><text:span text:style-name="HTML_20_Code"><text:span text:style-name="T4">1. Ch6 <text:s/>Add <text:s text:c="3"/>X1 (Weight 100)</text:span></text:span></text:p>
      <text:p text:style-name="code_20_Style1"><text:span text:style-name="HTML_20_Code"><text:span text:style-name="T4">2. Ch6 <text:s/>Mltply Y1 (Weight -40, Offset 60)</text:span></text:span></text:p>
      <text:p text:style-name="Standard"><text:span text:style-name="HTML_20_Code"/></text:p>
      <text:h text:style-name="Heading_20_3" text:outline-level="3">Example 12: Adjust idle throttle with knob</text:h>
      <text:p text:style-name="P7">Suppose we have a gasoline-powered model and want to adjust the idle setting of engine with the knob without affecting full throttle. Assuming the throttle servo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h text:style-name="Heading_20_3" text:outline-level="3"><text:soft-page-break/>Example 13: Adjust maximum throttle with knob</text:h>
      <text:p text:style-name="P7">We can adjust the maximum throttle without affecting the low throttle setting. Assuming the motor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p text:style-name="Standard"><text:span text:style-name="HTML_20_Code"/></text:p>
      <text:h text:style-name="Heading_20_3" text:outline-level="3">Example 14: Simple throttle cut</text:h>
      <text:p text:style-name="P7">Assuming Ch3 is the throttle channel, and assigning SwA for cut. When SwA is in the up position, Ch3 is locked to -100, otherwise the Throttle input is sent to Ch3.</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SwA_Up)</text:span></text:span></text:p>
      <text:p text:style-name="P7">Alternatively, a much safer throttle cut can be achieved in the Outputs screen by specifying the override as SwA and value -100.</text:p>
      <text:h text:style-name="Heading_20_3" text:outline-level="3">Example 15: Sticky throttle cut</text:h>
      <text:p text:style-name="P7">Assuming Ch3 is the throttle channel, and assigning SwA for cut. Also assume our Throttle source is Y1 axis. We want the throttle cut whenever SwA is in the up position, but to only remove the cut when the throttle is at minimum and SwA is in the down position.<text:line-break/>This example makes use of logical switches as follows.</text:p>
      <text:p text:style-name="code_20_Style1"><text:span text:style-name="HTML_20_Code"><text:span text:style-name="T4">L1</text:span></text:span></text:p>
      <text:p text:style-name="code_20_Style1"><text:span text:style-name="HTML_20_Code"><text:span text:style-name="T4">Func: <text:s text:c="2"/>Latch</text:span></text:span></text:p>
      <text:p text:style-name="code_20_Style1"><text:span text:style-name="HTML_20_Code"><text:span text:style-name="T4">Set: <text:s text:c="3"/>SwA_Up</text:span></text:span></text:p>
      <text:p text:style-name="code_20_Style1"><text:span text:style-name="HTML_20_Code"><text:span text:style-name="T4">Reset: <text:s/>L3</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Y1</text:span></text:span></text:p>
      <text:p text:style-name="code_20_Style1"><text:span text:style-name="HTML_20_Code"><text:span text:style-name="T4">Value2: -10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SwA_down</text:span></text:span></text:p>
      <text:p text:style-name="code_20_Style1"><text:span text:style-name="HTML_20_Code"><text:span text:style-name="T4">Value2: L2</text:span></text:span></text:p>
      <text:p text:style-name="P7">Then in the mixer</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L1)</text:span></text:span></text:p>
      <text:p text:style-name="P7">Alternatively, a much safer throttle cut can be achieved in the Outputs screen by specifying the override as L1 and value -100.</text:p>
      <text:h text:style-name="Heading_20_3" text:outline-level="3"><text:soft-page-break/>Example 16: Landing gear sequencer (gear doors stay open after gear is extended)</text:h>
      <text:p text:style-name="P7">The sequence we want upon flicking the switch is: doors open, gear extends. Similarly in the opposite direction: gear retracts, doors close. Using SwD for operation and assuming gear doors on Ch6 and gear on Ch7.</text:p>
      <text:p text:style-name="code_20_Style1"><text:span text:style-name="HTML_20_Code"><text:span text:style-name="T4">1. Ch6 <text:s/>Add <text:s/>SwD (Weight 100, DelayUp 0 s, DelayDown 3 s, SlowUp 2 s, SlowDown 2 s)</text:span></text:span></text:p>
      <text:p text:style-name="code_20_Style1"><text:span text:style-name="HTML_20_Code"><text:span text:style-name="T4">2. Ch7 <text:s/>Add <text:s/>SwD (Weight 100, DelayUp 3 s, DelayDown 0 s, SlowUp 2 s, SlowDown 2 s)</text:span></text:span></text:p>
      <text:p text:style-name="Standard"><text:span text:style-name="HTML_20_Code"/></text:p>
      <text:h text:style-name="Heading_20_4" text:outline-level="4">Alternative method that uses custom curves</text:h>
      <text:p text:style-name="P7">Set up two custom curves as follows.</text:p>
      <text:p text:style-name="code_20_Style1"><text:span text:style-name="HTML_20_Code"><text:span text:style-name="T4">Curve1</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P7"><draw:frame draw:style-name="fr1" draw:name="Picture 9" text:anchor-type="as-char" svg:width="12.642cm" svg:height="3.112cm" draw:z-index="8"><draw:image xlink:href="Pictures/100000010000020800000080B733F0F5.png" xlink:type="simple" xlink:show="embed" xlink:actuate="onLoad" draw:mime-type="image/png"/><svg:desc>D:\Ba\rc radio project\New stuff\Beta40\doc\images\screenshots\curve_landing_gear_sequencer.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5 s, SlowDown 5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3" text:outline-level="3">Example 17: Landing gear sequencer (gear doors close after gear is extended)</text:h>
      <text:p text:style-name="P7">The extend sequence is doors open, gear is lowered, doors close. <text:line-break/>The retract sequence is doors open, gear retracts, doors close. <text:line-break/>We can achieve the above using custom curves in combination with a slowed switch.</text:p>
      <text:h text:style-name="Heading_20_4" text:outline-level="4">Servo version</text:h>
      <text:p text:style-name="P35">Set up two custom curves as follows.</text:p>
      <text:p text:style-name="code_20_Style1"><text:soft-page-break/><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8" text:anchor-type="as-char" svg:width="10.968cm" svg:height="2.701cm" draw:z-index="9"><draw:image xlink:href="Pictures/1000000100000208000000807357B4DD.png" xlink:type="simple" xlink:show="embed" xlink:actuate="onLoad" draw:mime-type="image/png"/><svg:desc>D:\Ba\rc radio project\New stuff\Beta40\doc\images\screenshots\curves_landing_gear_sequencer_advanced_v1.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7 s, SlowDown 7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4" text:outline-level="4">Retract actuator version</text:h>
      <text:p text:style-name="P7">Most electric retract actuators require an on/off control signal, so this example is designed to work with these. <text:line-break/>Set up three custom curves as follows.</text:p>
      <text:p text:style-name="code_20_Style1"><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3</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7" text:anchor-type="as-char" svg:width="15.566cm" svg:height="2.542cm" draw:z-index="10"><draw:image xlink:href="Pictures/10000001000003100000008089C886C6.png" xlink:type="simple" xlink:show="embed" xlink:actuate="onLoad" draw:mime-type="image/png"/><svg:desc>D:\Ba\rc radio project\New stuff\Beta40\doc\images\screenshots\curves_landing_gear_sequencer_advanced_v2.png</svg:desc></draw:frame></text:p>
      <text:p text:style-name="P7">Then in the mixer, assuming gear door servos on Ch7, gear retracts on Ch8, and using SwD to operate,</text:p>
      <text:p text:style-name="code_20_Style1"><text:span text:style-name="HTML_20_Code"><text:span text:style-name="T4">1. Virt1 Add <text:s text:c="2"/>SwD <text:s text:c="2"/>(Weight 100, SlowUp 10 s, SlowDown 10 s) <text:s text:c="2"/>//Create a source that slowly ramps</text:span></text:span></text:p>
      <text:p text:style-name="code_20_Style1"><text:soft-page-break/><text:span text:style-name="HTML_20_Code"><text:span text:style-name="T4">2. Ch7 <text:s text:c="2"/>Add <text:s text:c="2"/>Virt1 (Weight 100, Custom Curve1) <text:s text:c="15"/>//Apply curve1 for the door sequence</text:span></text:span></text:p>
      <text:p text:style-name="code_20_Style1"><text:span text:style-name="HTML_20_Code"><text:span text:style-name="T4">3. Ch8 <text:s text:c="2"/>Add <text:s text:c="2"/>Virt1 (Weight 100, Custom Curve2) <text:s text:c="15"/>//Apply curve2 for the gear extend sequence</text:span></text:span></text:p>
      <text:p text:style-name="code_20_Style1"><text:span text:style-name="HTML_20_Code"><text:span text:style-name="T4">4. Ch8 <text:s text:c="2"/>RplcW Virt1 (Weight 100, Custom Curve3, Switch SwD_Up) //Apply curve3 for the gear retract sequence</text:span></text:span></text:p>
      <text:p text:style-name="P7">We can, if necessary, set Ch8 to 'Digital' mode in the receiver output configuration screen.</text:p>
      <text:h text:style-name="Heading_20_3" text:outline-level="3">Example 18: Servo tester</text:h>
      <text:p text:style-name="P7">We can program a simple servo tester that repeatedly moves a servo back and forth. <text:line-break/>In the extras menu, navigate to Function generator and select the desired movement type. <text:line-break/>Then in the mixer, assuming the servo is connected to Ch8,</text:p>
      <text:p text:style-name="code_20_Style1"><text:span text:style-name="HTML_20_Code"><text:span text:style-name="T4">1. Ch8 <text:s/>Add <text:s/>Fgen1 (Weight 100)</text:span></text:span></text:p>
      <text:p text:style-name="P7">We can also make it more interesting by adding the ability to switch between waveforms or patterns via a switch. This is left as an exercise.</text:p>
      <text:h text:style-name="Heading_20_3" text:outline-level="3">Example 19: Random servo motion generator</text:h>
      <text:p text:style-name="P7">Suppose we have a model equipped with a turret, or a figure. We want the servo to move automatically but in a random and intermittent manner. <text:line-break/>We can achieve this with function generators and logical switches as follows.</text:p>
      <text:p text:style-name="code_20_Style1"><text:span text:style-name="HTML_20_Code"><text:span text:style-name="T4">Fgen1</text:span></text:span></text:p>
      <text:p text:style-name="code_20_Style1"><text:span text:style-name="HTML_20_Code"><text:span text:style-name="T4">Waveform: Random</text:span></text:span></text:p>
      <text:p text:style-name="code_20_Style1"><text:span text:style-name="HTML_20_Code"><text:span text:style-name="T4">Interval: 2.0 s</text:span></text:span></text:p>
      <text:p text:style-name="code_20_Style1"><text:span text:style-name="HTML_20_Code"><text:span text:style-name="T4"/></text:span></text:p>
      <text:p text:style-name="code_20_Style1"><text:span text:style-name="HTML_20_Code"><text:span text:style-name="T4">Fgen2</text:span></text:span></text:p>
      <text:p text:style-name="code_20_Style1"><text:span text:style-name="HTML_20_Code"><text:span text:style-name="T4">Waveform: Random</text:span></text:span></text:p>
      <text:p text:style-name="code_20_Style1"><text:span text:style-name="HTML_20_Code"><text:span text:style-name="T4">Interval: 1.3 s</text:span></text:span></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2</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2"/>Fgen1 (Weight 100)</text:span></text:span></text:p>
      <text:p text:style-name="code_20_Style1"><text:span text:style-name="HTML_20_Code"><text:span text:style-name="T4">2. Ch7 <text:s text:c="2"/>Hold <text:s text:c="7"/>(Switch L1)</text:span></text:span></text:p>
      <text:p text:style-name="code_20_Style1"><text:span text:style-name="HTML_20_Code"><text:span text:style-name="T4">3. Ch7 <text:s text:c="2"/>RplcW Ch7 <text:s text:c="2"/>(Weight 100, SlowUp 2 s, SlowDown 2 s)</text:span></text:span></text:p>
      <text:p text:style-name="P7">Explanation: <text:line-break/>Fgen1 generates a random position periodically, Fgen2 via Logical switch L1 is used to hold the output randomly to create the impression of intermittent motion. The last mixer line helps smooth the movement. <text:line-break/>If desired, we can also incorporate a custom curve to sort of bias the generated servo positions, for example if we want our turret be pointing around the middle most of the time. <text:line-break/>We can also easily modify the setup to include an extra switch to manually stop the motion.</text:p>
      <text:h text:style-name="Heading_20_3" text:outline-level="3"><text:soft-page-break/>Example 20: Random servo motion generator (advanced version)</text:h>
      <text:p text:style-name="P7">This example generates a random servo position at a random interval, with an added effect of random intermittency, and also random selection between two speeds.<text:line-break/>Furthermore, a physical switch SwE is used to start/stop the random motion of the servo.</text:p>
      <text:p text:style-name="code_20_Style1"><text:span text:style-name="HTML_20_Code"><text:span text:style-name="T4">Fgen1</text:span></text:span></text:p>
      <text:p text:style-name="code_20_Style1"><text:span text:style-name="HTML_20_Code"><text:span text:style-name="T4">Waveform: <text:s text:c="5"/>Random</text:span></text:span></text:p>
      <text:p text:style-name="code_20_Style1"><text:span text:style-name="HTML_20_Code"><text:span text:style-name="T4">Interval mode: Variable</text:span></text:span></text:p>
      <text:p text:style-name="code_20_Style1"><text:span text:style-name="HTML_20_Code"><text:span text:style-name="T4">Min Interval: <text:s/>1.0 s</text:span></text:span></text:p>
      <text:p text:style-name="code_20_Style1"><text:span text:style-name="HTML_20_Code"><text:span text:style-name="T4">Max Interval: <text:s/>2.0 s</text:span></text:span></text:p>
      <text:p text:style-name="code_20_Style1"><text:span text:style-name="HTML_20_Code"><text:span text:style-name="T5">Modulator</text:span></text:span><text:span text:style-name="HTML_20_Code"><text:span text:style-name="T4">: <text:s text:c="4"/>Fgen2</text:span></text:span></text:p>
      <text:p text:style-name="code_20_Style1"><text:span text:style-name="HTML_20_Code"><text:span text:style-name="T4"/></text:span></text:p>
      <text:p text:style-name="code_20_Style1"><text:span text:style-name="HTML_20_Code"><text:span text:style-name="T4">Fgen2 <text:s/>(modulates the interval of Fgen1)</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3 <text:s/>(used for the intermittent motion)</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4 <text:s/>(used for the selection between two speeds)</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2.0 s</text:span></text:span></text:p>
      <text:p text:style-name="P7">Then set up two logical switches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3</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gt;x</text:span></text:span></text:p>
      <text:p text:style-name="code_20_Style1"><text:span text:style-name="HTML_20_Code"><text:span text:style-name="T4">Value1: Fgen4</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3"/>Fgen1 (Weight 100)</text:span></text:span></text:p>
      <text:p text:style-name="code_20_Style1"><text:span text:style-name="HTML_20_Code"><text:span text:style-name="T4">2. Ch7 <text:s text:c="2"/>Hold <text:s text:c="8"/>(Switch L1)</text:span></text:span></text:p>
      <text:p text:style-name="code_20_Style1"><text:span text:style-name="HTML_20_Code"><text:span text:style-name="T4">3. Ch7 <text:s text:c="2"/>RplcW <text:s/>Max <text:s text:c="2"/>(Weight 0, SwE_Up) </text:span></text:span></text:p>
      <text:p text:style-name="code_20_Style1"><text:span text:style-name="HTML_20_Code"><text:span text:style-name="T4">4. Ch7 <text:s text:c="2"/>RplcW <text:s/>Ch7 <text:s text:c="2"/>(Weight 100, SlowUp 5 s, SlowDown 5 s, Switch L2)</text:span></text:span></text:p>
      <text:p text:style-name="code_20_Style1"><text:span text:style-name="HTML_20_Code"><text:span text:style-name="T4">5. Ch7 <text:s text:c="2"/>RplcW <text:s/>Ch7 <text:s text:c="2"/>(Weight 100, SlowUp 2 s, SlowDown 2 s)</text:span></text:span></text:p>
      <text:p text:style-name="Standard"><text:span text:style-name="HTML_20_Code"/></text:p>
      <text:h text:style-name="Heading_20_3" text:outline-level="3">Example 21: Oscillation without using the built-in function generator</text:h>
      <text:p text:style-name="P7">Here is a way to create a crude oscillator from scratch.<text:line-break/>Set up a custom curve that defines the shape of our arbitrary waveform. For example,</text:p>
      <text:p text:style-name="code_20_Style1"><text:span text:style-name="HTML_20_Code"><text:span text:style-name="T4">Curve1</text:span></text:span></text:p>
      <text:p text:style-name="code_20_Style1"><text:span text:style-name="HTML_20_Code"><text:span text:style-name="T4">Type: 5 point</text:span></text:span></text:p>
      <text:p text:style-name="code_20_Style1"><text:span text:style-name="HTML_20_Code"><text:span text:style-name="T4">Point(x,y): PtA(-100,0) PtB(-50,-100) PtC(0,0) PtD(50,100), PtE(100, 0)</text:span></text:span></text:p>
      <text:p text:style-name="code_20_Style1"><text:soft-page-break/><text:span text:style-name="HTML_20_Code"><text:span text:style-name="T4">Smooth: True</text:span></text:span></text:p>
      <text:p text:style-name="P7">Then define a logical switch as follows.</text:p>
      <text:p text:style-name="code_20_Style1"><text:span text:style-name="HTML_20_Code"><text:span text:style-name="T4">L1</text:span></text:span></text:p>
      <text:p text:style-name="code_20_Style1"><text:span text:style-name="HTML_20_Code"><text:span text:style-name="T4">Func: <text:s text:c="2"/>a&lt;x</text:span></text:span></text:p>
      <text:p text:style-name="code_20_Style1"><text:span text:style-name="HTML_20_Code"><text:span text:style-name="T4">Value1: Virt1</text:span></text:span></text:p>
      <text:p text:style-name="code_20_Style1"><text:span text:style-name="HTML_20_Code"><text:span text:style-name="T4">Value2: 100</text:span></text:span></text:p>
      <text:p text:style-name="P7">Then in the mixer, we make use of the 'slow' feature on the L1 mixer input. This essentially creates a sawtooth waveform on Virt1. Assuming our final output is on Ch1, we specify the input as Virt1 and apply the custom curve.</text:p>
      <text:p text:style-name="code_20_Style1"><text:span text:style-name="HTML_20_Code"><text:span text:style-name="T4">1. Virt1 <text:s/>Add <text:s/>L1 <text:s text:c="3"/>(Weight 100, SlowUp 1 s, SlowDown 0 s)</text:span></text:span></text:p>
      <text:p text:style-name="code_20_Style1"><text:span text:style-name="HTML_20_Code"><text:span text:style-name="T4">2. Ch1 <text:s text:c="3"/>Add <text:s/>Virt1 (Weight 100, Custom Curve1)</text:span></text:span></text:p>
      <text:p text:style-name="Standard"><text:span text:style-name="HTML_20_Code"/></text:p>
      <text:h text:style-name="Heading_20_3" text:outline-level="3">Example 22: Aileron rudder mixing with automatic switching</text:h>
      <text:p text:style-name="P7">When the Rudder stick is centered and the Aileron stick is moved away from center, the mix is activated (Aileron stick now controls the rudder). <text:line-break/>The mix is deactivated as soon as the Rudder stick is moved away from center (Rudder stick now controls the Rudder). <text:line-break/>When both sticks are centered the mix gets activated again. <text:line-break/>We can achieve this behaviour with the help of logical switches as follows.</text:p>
      <text:p text:style-name="code_20_Style1"><text:span text:style-name="HTML_20_Code"><text:span text:style-name="T4">L1</text:span></text:span></text:p>
      <text:p text:style-name="code_20_Style1"><text:span text:style-name="HTML_20_Code"><text:span text:style-name="T4">Func: <text:s text:c="2"/>a==x</text:span></text:span></text:p>
      <text:p text:style-name="code_20_Style1"><text:span text:style-name="HTML_20_Code"><text:span text:style-name="T4">Value1: Rud</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Ail</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L1</text:span></text:span></text:p>
      <text:p text:style-name="code_20_Style1"><text:span text:style-name="HTML_20_Code"><text:span text:style-name="T4">Value2: L2</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Func: <text:s text:c="2"/>Latch</text:span></text:span></text:p>
      <text:p text:style-name="code_20_Style1"><text:span text:style-name="HTML_20_Code"><text:span text:style-name="T4">Set: <text:s text:c="3"/>L3</text:span></text:span></text:p>
      <text:p text:style-name="code_20_Style1"><text:span text:style-name="HTML_20_Code"><text:span text:style-name="T4">Reset: <text:s/>!L1</text:span></text:span></text:p>
      <text:p text:style-name="P7">Then in the mixer, assuming the rudder servo is on Ch4,</text:p>
      <text:p text:style-name="code_20_Style1"><text:span text:style-name="HTML_20_Code"><text:span text:style-name="T4">1. Virt1 Add <text:s text:c="4"/>Max <text:s text:c="2"/>(Weight 100, Switch L4)</text:span></text:span></text:p>
      <text:p text:style-name="code_20_Style1"><text:span text:style-name="HTML_20_Code"><text:span text:style-name="T4">2. Ch4 <text:s text:c="2"/>Add <text:s text:c="4"/>Ail <text:s text:c="2"/>(Weight 100, No trim)</text:span></text:span></text:p>
      <text:p text:style-name="code_20_Style1"><text:span text:style-name="HTML_20_Code"><text:span text:style-name="T4">3. Ch4 <text:s text:c="2"/>Mltply <text:s/>Virt1 (Weight 100, SlowDown 1 s)</text:span></text:span></text:p>
      <text:p text:style-name="code_20_Style1"><text:span text:style-name="HTML_20_Code"><text:span text:style-name="T4">4. Ch4 <text:s text:c="2"/>Add <text:s text:c="4"/>Rud <text:s text:c="2"/>(Weight 100)</text:span></text:span></text:p>
      <text:p text:style-name="P7">Here, Virt1 is used to smooth the transition from the Aileron stick to the Rudder stick.</text:p>
      <text:h text:style-name="Heading_20_3" text:outline-level="3"><text:soft-page-break/>Example 23: Adjust aileron differential with the knob</text:h>
      <text:p text:style-name="P7">This example illustrates a method for adjusting aileron differential in-flight, eliminating the need to land whenever we want to tweak the setting. It is quite handy for experimenting with different values and helping with fine tuning.<text:line-break/>As we rotate the knob clockwise, the differential increases from 0% to 100%.</text:p>
      <text:p text:style-name="P7">Setup a logical switch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Ail </text:span></text:span></text:p>
      <text:p text:style-name="code_20_Style1"><text:span text:style-name="HTML_20_Code"><text:span text:style-name="T4">Value2: 0</text:span></text:span></text:p>
      <text:p text:style-name="P7">Then in the mixer, assuming the left aileron servo in Ch1, right aileron servo in Ch8</text:p>
      <text:p text:style-name="code_20_Style1"><text:span text:style-name="HTML_20_Code"><text:span text:style-name="T4">1. Ch1 <text:s text:c="2"/>Add <text:s text:c="4"/>Ail <text:s text:c="3"/>(Weight -100, No trim)</text:span></text:span></text:p>
      <text:p text:style-name="code_20_Style1"><text:span text:style-name="HTML_20_Code"><text:span text:style-name="T4">2. Ch1 <text:s text:c="2"/>Mltply <text:s/>KnobB <text:s/>(Weight -50, Offset 50, Switch L1)</text:span></text:span></text:p>
      <text:p text:style-name="code_20_Style1"><text:span text:style-name="HTML_20_Code"><text:span text:style-name="T4">3. Ch1 <text:s text:c="2"/>Add <text:s text:c="4"/>X2Trim (Weight -100)</text:span></text:span></text:p>
      <text:p text:style-name="code_20_Style1"><text:span text:style-name="HTML_20_Code"><text:span text:style-name="T4">4. Ch8 <text:s text:c="2"/>Add <text:s text:c="4"/>Ail <text:s text:c="3"/>(Weight 100, No trim)</text:span></text:span></text:p>
      <text:p text:style-name="code_20_Style1"><text:span text:style-name="HTML_20_Code"><text:span text:style-name="T4">5. Ch8 <text:s text:c="2"/>Mltply <text:s/>KnobB <text:s/>(Weight -50, Offset 50, Switch !L1)</text:span></text:span></text:p>
      <text:p text:style-name="code_20_Style1"><text:span text:style-name="HTML_20_Code"><text:span text:style-name="T4">6. Ch8 <text:s text:c="2"/>Add <text:s text:c="4"/>X2Trim (Weight 100)</text:span></text:span></text:p>
      <text:p text:style-name="P7">Explanation:<text:line-break/>Differential is applied to the downward going aileron. When the Ail stick is moved right, we apply differential to the left aileron. Similarly when the Ail stick is moved left, we apply differential to the right aileron.<text:line-break/>We detect the direction of the Ail stick via the logical switch L1 and use it to selectively apply the differential effect via a multiply mix.<text:line-break/>For this case, we also decouple the trim and add it afterward, to prevent it being affected by the differential.</text:p>
      <text:p text:style-name="Standard"/>
      <text:h text:style-name="P5" text:outline-level="1"><text:bookmark text:name="_Outputs"/>Outputs</text:h>
      <text:p text:style-name="P7">Outputs are the last stage of the processing chain (Inputs ---&gt; Mixer ---&gt; Outputs).<text:line-break/>It is where final adjustments to the control data are made before transmission to the receiver.</text:p>
      <text:p text:style-name="P7"><draw:frame draw:style-name="fr1" draw:name="Picture 13" text:anchor-type="as-char" svg:width="5.389cm" svg:height="3.03cm" draw:z-index="11"><draw:image xlink:href="Pictures/10000001000001000000009092F2CA2E.png" xlink:type="simple" xlink:show="embed" xlink:actuate="onLoad" draw:mime-type="image/png"/><svg:desc>D:\Ba\rc radio project\New stuff\Beta40\doc\images\screenshots\outputs.png</svg:desc></draw:frame><text:s text:c="4"/><draw:frame draw:style-name="fr1" draw:name="Picture 12" text:anchor-type="as-char" svg:width="5.35cm" svg:height="3.009cm" draw:z-index="12"><draw:image xlink:href="Pictures/100000010000010000000090E269E195.png" xlink:type="simple" xlink:show="embed" xlink:actuate="onLoad" draw:mime-type="image/png"/><svg:desc>D:\Ba\rc radio project\New stuff\Beta40\doc\images\screenshots\outputs_monitor.png</svg:desc></draw:frame></text:p>
      <text:p text:style-name="Standard">Fields</text:p>
      <text:list text:style-name="WWNum10">
        <text:list-item>
          <text:p text:style-name="P36">Reverse: Useful for correcting the servo or actuator direction relative to the controls.</text:p>
        </text:list-item>
        <text:list-item>
          <text:p text:style-name="P37">Subtrim: Adjusts the center position of the servo or actuator. A side effect of using subtrim is that it causes clipping at the ends. E.g. if the mixer is outputting -100 to 100, a subtrim of say +5 shifts the usable range of the servo to -95 to 100.</text:p>
        </text:list-item>
        <text:list-item>
          <text:p text:style-name="P37">Override: This is mainly a safety feature used for throttle cut, etc. It overrides the channel's output with the specified value when the activation switch is on.</text:p>
        </text:list-item>
        <text:list-item>
          <text:p text:style-name="P37">Failsafe: The receiver will output the specified value after about 1 second of signal loss from the transmitter. Supported modes are Hold, No pulse, or custom value.</text:p>
        </text:list-item>
        <text:list-item>
          <text:p text:style-name="P37">Endpoints: Sets the overall travel or endpoints of the servo arm movement. Useful when we want to avoid any potential binding of a linkage or surface.</text:p>
        </text:list-item>
        <text:list-item>
          <text:p text:style-name="P38">Curve: Specifies the custom curve to use for this output. Useful when we want to correct for linkage geometry, mechanical differences, etc.</text:p>
        </text:list-item>
      </text:list>
      <text:p text:style-name="Standard"/>
      <text:h text:style-name="P5" text:outline-level="1"><text:bookmark text:name="_Custom_curves"/>Custom curves</text:h>
      <text:p text:style-name="P7">These can be used in the mixer and the outputs screen. They basically define a relation between an input (along the x) and output (along the y).<text:line-break/>Any point/node on the curve can be freely moved around to get the desired shape of curve. Up to 10 points/nodes can be defined.<text:line-break/>The curve can also be optionally smoothed, although this feature should be used sparingly as it is relatively CPU intensive.</text:p>
      <text:p text:style-name="P7"><draw:frame draw:style-name="fr1" draw:name="Picture 14" text:anchor-type="as-char" svg:width="6.773cm" svg:height="3.387cm" draw:z-index="13"><draw:image xlink:href="Pictures/1000000000000100000000805F3CA18F.png" xlink:type="simple" xlink:show="embed" xlink:actuate="onLoad" draw:mime-type="image/png"/><svg:desc>D:\Ba\rc radio project\New stuff\Beta40\doc\images\screenshots\custom_curves.png</svg:desc></draw:frame></text:p>
      <text:h text:style-name="Heading_20_2" text:outline-level="2">Combining two curves for extra points or nodes</text:h>
      <text:p text:style-name="P7">If more curve points are needed, a work around is to combine two curves by switching out one for the other in the mixer, with help of a logical switch.</text:p>
      <text:h text:style-name="Heading_20_2" text:outline-level="2">Usage examples</text:h>
      <text:p text:style-name="P7">Below are some examples demonstrating the use of custom curves.</text:p>
      <text:list text:style-name="WWNum11">
        <text:list-item>
          <text:p text:style-name="P39"><text:a xlink:type="simple" xlink:href="#Example 16: Landing gear sequencer (gear doors stay open after gear is extended)|outline" text:style-name="Internet_20_link" text:visited-style-name="Visited_20_Internet_20_Link"><text:span text:style-name="Internet_20_link">Landing gear sequencer</text:span></text:a></text:p>
        </text:list-item>
        <text:list-item>
          <text:p text:style-name="P40"><text:a xlink:type="simple" xlink:href="#Example 17: Landing gear sequencer (gear doors close after gear is extended)|outline" text:style-name="Internet_20_link" text:visited-style-name="Visited_20_Internet_20_Link"><text:span text:style-name="Internet_20_link">Landing gear sequencer - advanced</text:span></text:a></text:p>
        </text:list-item>
        <text:list-item>
          <text:p text:style-name="P41"><text:a xlink:type="simple" xlink:href="#Example 21: Oscillation without using the built-in function generator|outline" text:style-name="Internet_20_link" text:visited-style-name="Visited_20_Internet_20_Link"><text:span text:style-name="Internet_20_link">Oscillator from scratch</text:span></text:a></text:p>
        </text:list-item>
      </text:list>
      <text:p text:style-name="Standard"/>
      <text:h text:style-name="P5" text:outline-level="1"><text:bookmark text:name="_Logical_switches"/>Logical switches</text:h>
      <text:p text:style-name="P7">These can be used to combine various conditions, compare values, etc. They are in essence user programmed virtual switches. They produce an on/off output.</text:p>
      <text:p text:style-name="P7"><draw:frame draw:style-name="fr1" draw:name="Picture 15" text:anchor-type="as-char" svg:width="6.773cm" svg:height="3.387cm" draw:z-index="14"><draw:image xlink:href="Pictures/10000001000001000000008054C75F4D.png" xlink:type="simple" xlink:show="embed" xlink:actuate="onLoad" draw:mime-type="image/png"/><svg:desc>D:\Ba\rc radio project\New stuff\Beta40\doc\images\screenshots\logical_switches.png</svg:desc></draw:frame></text:p>
      <text:p text:style-name="P7">The available functions can be categorized into the following types.</text:p>
      <text:list text:style-name="WWNum12">
        <text:list-item>
          <text:p text:style-name="P42">Comparators (Greater than, Less than, Equal, Greater than or equal, Less than or equal)</text:p>
        </text:list-item>
        <text:list-item>
          <text:p text:style-name="P43">Combinational (AND, OR, XOR)</text:p>
        </text:list-item>
        <text:list-item>
          <text:p text:style-name="P43">Latches (SR latch)</text:p>
        </text:list-item>
        <text:list-item>
          <text:p text:style-name="P43">Flip-flops (Toggle)</text:p>
        </text:list-item>
        <text:list-item>
          <text:p text:style-name="P44">Generators (Pulse)</text:p>
        </text:list-item>
      </text:list>
      <text:h text:style-name="Heading_20_2" text:outline-level="2">Usage examples</text:h>
      <text:p text:style-name="P7"><text:a xlink:type="simple" xlink:href="#Example 1: A mix activated by combination of two switches|outline" text:style-name="Internet_20_link" text:visited-style-name="Visited_20_Internet_20_Link"><text:span text:style-name="Internet_20_link">1. A mix activated by combination of two switches</text:span></text:a><text:line-break/><text:a xlink:type="simple" xlink:href="#Example 2: LED lights that flash when flight battery is low|outline" text:style-name="Internet_20_link" text:visited-style-name="Visited_20_Internet_20_Link"><text:span text:style-name="Internet_20_link">2. LED lights that flash when flight battery is low</text:span></text:a><text:line-break/><text:a xlink:type="simple" xlink:href="#Example 3: Stopwatch operated by a single momentary switch for start/stop and reset|outline" text:style-name="Internet_20_link" text:visited-style-name="Visited_20_Internet_20_Link"><text:span text:style-name="Internet_20_link">3. Stopwatch operated by a single momentary switch</text:span></text:a><text:line-break/><text:a xlink:type="simple" xlink:href="#Example 4: Throttle timer (simple)|outline" text:style-name="Internet_20_link" text:visited-style-name="Visited_20_Internet_20_Link"><text:span text:style-name="Internet_20_link">4. Throttle timer - simple</text:span></text:a><text:line-break/><text:a xlink:type="simple" xlink:href="#Example 5: Throttle timer (advanced)|outline" text:style-name="Internet_20_link" text:visited-style-name="Visited_20_Internet_20_Link"><text:span text:style-name="Internet_20_link">5. Throttle timer - advanced</text:span></text:a><text:line-break/><text:a xlink:type="simple" xlink:href="#Example 6: Zero crossing detection|outline" text:style-name="Internet_20_link" text:visited-style-name="Visited_20_Internet_20_Link"><text:span text:style-name="Internet_20_link">6. Zero crossing detection</text:span></text:a><text:line-break/><text:a xlink:type="simple" xlink:href="#Example 7: Using a momentary switch to cycle among four values or states|outline" text:style-name="Internet_20_link" text:visited-style-name="Visited_20_Internet_20_Link"><text:span text:style-name="Internet_20_link">7. Using a momentary switch to cycle among values</text:span></text:a><text:line-break/><text:a xlink:type="simple" xlink:href="#Example 8: Detecting receiver connection or disconnection|outline" text:style-name="Internet_20_link" text:visited-style-name="Visited_20_Internet_20_Link"><text:span text:style-name="Internet_20_link"><text:span text:style-name="T6">8. Detecting receiver connection or disconnection </text:span></text:span></text:a></text:p>
      <text:h text:style-name="Heading_20_3" text:outline-level="3">Example 1: A mix activated by combination of two switches</text:h>
      <text:p text:style-name="P7">Suppose we want a mix to be turned on only when two switches (e.g. SwA, SwB) are both on. We need to set up a logical switch say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SwA_down</text:span></text:span></text:p>
      <text:p text:style-name="code_20_Style1"><text:span text:style-name="HTML_20_Code"><text:span text:style-name="T4">Value2: SwB_down</text:span></text:span></text:p>
      <text:p text:style-name="HTML_20_Preformatted"><text:span text:style-name="HTML_20_Code"><text:span text:style-name="T4"/></text:span></text:p>
      <text:p text:style-name="P7">Then in the mixer, we simply have to set the control switch to L1.</text:p>
      <text:h text:style-name="Heading_20_3" text:outline-level="3"><text:soft-page-break/>Example 2: LED lights that flash when flight battery is low</text:h>
      <text:p text:style-name="P7">Suppose we have a model that is equipped with some LED lights that we want to switch on when the flight battery voltage (telemetry) falls below a certain threshold for more than say five seconds. <text:line-break/>We can easily achieve this like so.</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lt;x</text:span></text:span></text:p>
      <text:p text:style-name="code_20_Style1"><text:span text:style-name="HTML_20_Code"><text:span text:style-name="T4">Value1: FlghtBatt</text:span></text:span></text:p>
      <text:p text:style-name="code_20_Style1"><text:span text:style-name="HTML_20_Code"><text:span text:style-name="T4">Value2: 10.80 V</text:span></text:span></text:p>
      <text:p text:style-name="code_20_Style1"><text:span text:style-name="HTML_20_Code"><text:span text:style-name="T4">Delay: <text:s/>5.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1.0 s</text:span></text:span></text:p>
      <text:p text:style-name="code_20_Style1"><text:span text:style-name="HTML_20_Code"><text:span text:style-name="T4">Period: 2.0 s</text:span></text:span></text:p>
      <text:p text:style-name="HTML_20_Preformatted"><text:span text:style-name="HTML_20_Code"><text:span text:style-name="T4"/></text:span></text:p>
      <text:p text:style-name="P7">Then in the mixer, we simply use L2 as the input source and L1 as the control switch for the mix, to operate the channel assigned to the LED lights.</text:p>
      <text:h text:style-name="Heading_20_3" text:outline-level="3">Example 3: Stopwatch operated by a single momentary switch for start/stop and reset</text:h>
      <text:p text:style-name="P7">When the switch is clicked, the timer runs/stops. When the switch is held long enough, the timer is reset. <text:line-break/>For this, we set up two logical switches to operate the timer as below, assuming SwH is our momentary switch.</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Falling</text:span></text:span></text:p>
      <text:p text:style-name="code_20_Style1"><text:span text:style-name="HTML_20_Code"><text:span text:style-name="T4">Clear: <text:s/>L2</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SwH</text:span></text:span></text:p>
      <text:p text:style-name="code_20_Style1"><text:span text:style-name="HTML_20_Code"><text:span text:style-name="T4">Value2: 0</text:span></text:span></text:p>
      <text:p text:style-name="code_20_Style1"><text:span text:style-name="HTML_20_Code"><text:span text:style-name="T4">Delay: <text:s/>0.5 s</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Reset: <text:s/>L2</text:span></text:span></text:p>
      <text:p text:style-name="HTML_20_Preformatted"><text:span text:style-name="HTML_20_Code"/></text:p>
      <text:h text:style-name="Heading_20_3" text:outline-level="3"><text:soft-page-break/>Example 4: Throttle timer (simple)</text:h>
      <text:p text:style-name="P7">When the throttle is moved beyond a certain threshold, the timer runs.<text:line-break/>Also if we have a throttle cut function on say SwA, we want the timer to only run when throttle cut is inactive. Assume the throttle source is the Y1 axi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Y1</text:span></text:span></text:p>
      <text:p text:style-name="code_20_Style1"><text:span text:style-name="HTML_20_Code"><text:span text:style-name="T4">Value2: -9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2</text:span></text:span></text:p>
      <text:p text:style-name="Standard"><text:span text:style-name="HTML_20_Code"/></text:p>
      <text:h text:style-name="Heading_20_3" text:outline-level="3">Example 5: Throttle timer (advanced)</text:h>
      <text:p text:style-name="P7">Suppose we want the speed at which the timer runs to be proportional to the throttle value.<text:line-break/>Also if we have a throttle cut function on say SwA, we want the timer to only run when throttle cut is inactive.<text:line-break/>Assume our throttle source is the Y1 axis.</text:p>
      <text:h text:style-name="Heading_20_4" text:outline-level="4">Method 1:</text:h>
      <text:p text:style-name="P7">Using the built-in function generator to generate a pulse width modulated signal that controls the timer.</text:p>
      <text:p text:style-name="code_20_Style1"><text:span text:style-name="HTML_20_Code"><text:span text:style-name="T4">Fgen1</text:span></text:span></text:p>
      <text:p text:style-name="code_20_Style1"><text:span text:style-name="HTML_20_Code"><text:span text:style-name="T4">-----</text:span></text:span></text:p>
      <text:p text:style-name="code_20_Style1"><text:span text:style-name="HTML_20_Code"><text:span text:style-name="T4">Waveform: <text:s text:c="2"/>Pulse</text:span></text:span></text:p>
      <text:p text:style-name="code_20_Style1"><text:span text:style-name="HTML_20_Code"><text:span text:style-name="T4">Width mode: Variable</text:span></text:span></text:p>
      <text:p text:style-name="code_20_Style1"><text:span text:style-name="HTML_20_Code"><text:span text:style-name="T4">Modulator: <text:s/>Y1</text:span></text:span></text:p>
      <text:p text:style-name="code_20_Style1"><text:span text:style-name="HTML_20_Code"><text:span text:style-name="T4">Reverse: <text:s text:c="3"/>False</text:span></text:span></text:p>
      <text:p text:style-name="code_20_Style1"><text:span text:style-name="HTML_20_Code"><text:span text:style-name="T4">Period: <text:s text:c="4"/>1.0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oft-page-break/><text:span text:style-name="HTML_20_Code"><text:span text:style-name="T4">Switch: L2</text:span></text:span></text:p>
      <text:p text:style-name="Standard"><text:span text:style-name="HTML_20_Code"/></text:p>
      <text:h text:style-name="Heading_20_4" text:outline-level="4">Method 2:</text:h>
      <text:p text:style-name="P7">Using the mixer and a virtual channel to create a pulse width modulated signal that controls the timer.</text:p>
      <text:p text:style-name="code_20_Style1"><text:span text:style-name="HTML_20_Code"><text:span text:style-name="T4">Mixer</text:span></text:span></text:p>
      <text:p text:style-name="code_20_Style1"><text:span text:style-name="HTML_20_Code"><text:span text:style-name="T4">-----</text:span></text:span></text:p>
      <text:p text:style-name="code_20_Style1"><text:span text:style-name="HTML_20_Code"><text:span text:style-name="T4">1. Virt1 <text:s/>Add <text:s/>L1 (Weight 99, SlowUp 0.5 s, SlowDown 0.5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0.5 s</text:span></text:span></text:p>
      <text:p text:style-name="code_20_Style1"><text:span text:style-name="HTML_20_Code"><text:span text:style-name="T4">Period: 1.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b</text:span></text:span></text:p>
      <text:p text:style-name="code_20_Style1"><text:span text:style-name="HTML_20_Code"><text:span text:style-name="T4">Value1: Y1</text:span></text:span></text:p>
      <text:p text:style-name="code_20_Style1"><text:span text:style-name="HTML_20_Code"><text:span text:style-name="T4">Value2: Virt1</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3</text:span></text:span></text:p>
      <text:p text:style-name="code_20_Style1"><text:span text:style-name="HTML_20_Code"><text:span text:style-name="T4"/></text:span></text:p>
      <text:p text:style-name="P7">If desired, we can also include a custom curve through a virtual channel, to compensate for the real world nonlinear relationship between current draw and throttle value.</text:p>
      <text:h text:style-name="Heading_20_3" text:outline-level="3">Example 6: Zero crossing detection</text:h>
      <text:p text:style-name="P7">Suppose we want to detect whenever a value from say a function generator crosses zero, so that we can trigger some other actio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delta|&gt;x</text:span></text:span></text:p>
      <text:p text:style-name="code_20_Style1"><text:span text:style-name="HTML_20_Code"><text:span text:style-name="T4">Value1: L1</text:span></text:span></text:p>
      <text:p text:style-name="code_20_Style1"><text:span text:style-name="HTML_20_Code"><text:span text:style-name="T4">Value2: 0</text:span></text:span></text:p>
      <text:p text:style-name="code_20_Style1"><text:span text:style-name="HTML_20_Code"><text:span text:style-name="T4">Dirctn: Both</text:span></text:span></text:p>
      <text:p text:style-name="code_20_Style1"><text:span text:style-name="HTML_20_Code"><text:span text:style-name="T4"/></text:span></text:p>
      <text:p text:style-name="P7"><text:soft-page-break/>L2 will now output a brief pulse whenever the output of the function generator crosses zero.</text:p>
      <text:h text:style-name="Heading_20_3" text:outline-level="3">Example 7: Using a momentary switch to cycle among four values or states</text:h>
      <text:p text:style-name="P7">Suppose we want an output channel to cycle among four levels whenever we click the momentary switch.</text:p>
      <text:h text:style-name="Heading_20_4" text:outline-level="4">Method 1:</text:h>
      <text:p text:style-name="P7">Set up a '2-bit' binary counter with its outputs on L2 and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Rising </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L1</text:span></text:span></text:p>
      <text:p text:style-name="code_20_Style1"><text:span text:style-name="HTML_20_Code"><text:span text:style-name="T4">Edge: <text:s text:c="2"/>Falling</text:span></text:span></text:p>
      <text:p text:style-name="code_20_Style1"><text:span text:style-name="HTML_20_Code"><text:span text:style-name="T4"/></text:span></text:p>
      <text:p text:style-name="P7">Use a truth table to set up logical switches L3, L4, L5, and L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L2</text:p>
          </table:table-cell>
          <table:table-cell table:style-name="Table1.A1" office:value-type="string">
            <text:p text:style-name="P45">L1</text:p>
          </table:table-cell>
          <table:table-cell table:style-name="Table1.A1" office:value-type="string">
            <text:p text:style-name="P45"/>
          </table:table-cell>
        </table:table-row>
        <table:table-row table:style-name="Table1.1">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L3</text:p>
          </table:table-cell>
        </table:table-row>
        <table:table-row table:style-name="Table1.1">
          <table:table-cell table:style-name="Table1.A1" office:value-type="string">
            <text:p text:style-name="P45">0</text:p>
          </table:table-cell>
          <table:table-cell table:style-name="Table1.A1" office:value-type="string">
            <text:p text:style-name="P45">1</text:p>
          </table:table-cell>
          <table:table-cell table:style-name="Table1.A1" office:value-type="string">
            <text:p text:style-name="P45">L4</text:p>
          </table:table-cell>
        </table:table-row>
        <table:table-row table:style-name="Table1.1">
          <table:table-cell table:style-name="Table1.A1" office:value-type="string">
            <text:p text:style-name="P45">1</text:p>
          </table:table-cell>
          <table:table-cell table:style-name="Table1.A1" office:value-type="string">
            <text:p text:style-name="P45">0</text:p>
          </table:table-cell>
          <table:table-cell table:style-name="Table1.A1" office:value-type="string">
            <text:p text:style-name="P45">L5</text:p>
          </table:table-cell>
        </table:table-row>
        <table:table-row table:style-name="Table1.1">
          <table:table-cell table:style-name="Table1.A1" office:value-type="string">
            <text:p text:style-name="P45">1</text:p>
          </table:table-cell>
          <table:table-cell table:style-name="Table1.A1" office:value-type="string">
            <text:p text:style-name="P45">1</text:p>
          </table:table-cell>
          <table:table-cell table:style-name="Table1.A1" office:value-type="string">
            <text:p text:style-name="P45">L6</text:p>
          </table:table-cell>
        </table:table-row>
      </table:table>
      <text:p text:style-name="P46"><text:line-break/><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P7"><text:soft-page-break/>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2:</text:h>
      <text:p text:style-name="P7">This makes use of the built-in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Clock: <text:s text:c="2"/>SwH_down</text:span></text:span></text:p>
      <text:p text:style-name="code_20_Style1"><text:span text:style-name="HTML_20_Code"><text:span text:style-name="T4">Edge: <text:s text:c="3"/>Rising</text:span></text:span></text:p>
      <text:p text:style-name="code_20_Style1"><text:span text:style-name="HTML_20_Code"><text:span text:style-name="T4">Modulus: 4</text:span></text:span></text:p>
      <text:p text:style-name="code_20_Style1"><text:span text:style-name="HTML_20_Code"><text:span text:style-name="T4">Dirctn: <text:s/>Up</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2</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3</text:span></text:span></text:p>
      <text:p text:style-name="code_20_Style1"><text:span text:style-name="HTML_20_Code"><text:span text:style-name="T4"/></text:span></text:p>
      <text:p text:style-name="P7">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3:</text:h>
      <text:p text:style-name="P7">This makes use of the built-in counter directly in the Mixer. <text:a xlink:type="simple" xlink:href="#Example 1: Using a 3 position momentary switch to sequentially select among values.|outline" text:style-name="Internet_20_link" text:visited-style-name="Visited_20_Internet_20_Link"><text:span text:style-name="Internet_20_link">See the example</text:span></text:a> under counters.</text:p>
      <text:h text:style-name="Heading_20_3" text:outline-level="3"><text:soft-page-break/>Example 8: Detecting receiver connection or disconnection</text:h>
      <text:p text:style-name="P7">This relies on the Link Quality telemetry to detect connection/disconnection of a receiver.<text:line-break/>First, configure the Link Quality telemetry (premade template already available).<text:line-break/>Then set up a logical switch and custom notifications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LinkQlty</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Notification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connect</text:span></text:span></text:p>
      <text:p text:style-name="code_20_Style1"><text:span text:style-name="HTML_20_Code"><text:span text:style-name="T4"/></text:span></text:p>
      <text:p text:style-name="code_20_Style1"><text:span text:style-name="HTML_20_Code"><text:span text:style-name="T4">Notification2</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disconnect</text:span></text:span></text:p>
      <text:p text:style-name="P7">This example can also be adapted to detect when telemetry from a sensor is lost or recovered.</text:p>
      <text:p text:style-name="Standard"/>
      <text:h text:style-name="P5" text:outline-level="1"><text:bookmark text:name="_Function_generators"/>Function generators</text:h>
      <text:p text:style-name="P7">These produce various waveforms over a range of frequencies or periods. They are implemented as low frequency oscillators, hence the reason why period instead of frequency is specifiable.<text:line-break/>Supported waveforms are sine, square, triangle, sawtooth, pulse, and random.<text:line-break/>The function generators are capable of frequency modulation, with smooth transition between frequencies.</text:p>
      <text:p text:style-name="P7"><draw:frame draw:style-name="fr1" draw:name="Picture 17" text:anchor-type="as-char" svg:width="6.773cm" svg:height="4.233cm" draw:z-index="15"><draw:image xlink:href="Pictures/1000000100000100000000A08B611755.png" xlink:type="simple" xlink:show="embed" xlink:actuate="onLoad" draw:mime-type="image/png"/><svg:desc>D:\Ba\rc radio project\New stuff\Beta40\doc\images\screenshots\function_generators_fixed_period.png</svg:desc></draw:frame><text:s text:c="4"/><draw:frame draw:style-name="fr1" draw:name="Picture 16" text:anchor-type="as-char" svg:width="6.773cm" svg:height="4.233cm" draw:z-index="16"><draw:image xlink:href="Pictures/1000000100000100000000A0C3E6FB8E.png" xlink:type="simple" xlink:show="embed" xlink:actuate="onLoad" draw:mime-type="image/png"/><svg:desc>D:\Ba\rc radio project\New stuff\Beta40\doc\images\screenshots\function_generators_variable_period.png</svg:desc></draw:frame></text:p>
      <text:h text:style-name="Heading_20_2" text:outline-level="2">Usage examples</text:h>
      <text:p text:style-name="P7">Below are some examples making use of function generators.</text:p>
      <text:list text:style-name="WWNum13">
        <text:list-item>
          <text:p text:style-name="P47"><text:a xlink:type="simple" xlink:href="#Example 18: Servo tester|outline" text:style-name="Internet_20_link" text:visited-style-name="Visited_20_Internet_20_Link"><text:span text:style-name="Internet_20_link">Servo tester</text:span></text:a></text:p>
        </text:list-item>
        <text:list-item>
          <text:p text:style-name="P48"><text:a xlink:type="simple" xlink:href="#Example 19: Random servo motion generator|outline" text:style-name="Internet_20_link" text:visited-style-name="Visited_20_Internet_20_Link"><text:span text:style-name="Internet_20_link">Random servo motion generator</text:span></text:a></text:p>
        </text:list-item>
        <text:list-item>
          <text:p text:style-name="P49"><text:a xlink:type="simple" xlink:href="#Example 20: Random servo motion generator (advanced version)|outline" text:style-name="Internet_20_link" text:visited-style-name="Visited_20_Internet_20_Link"><text:span text:style-name="Internet_20_link">Random servo motion generator - advanced</text:span></text:a></text:p>
        </text:list-item>
      </text:list>
      <text:p text:style-name="Standard"/>
      <text:h text:style-name="P5" text:outline-level="1"><text:bookmark text:name="_Timers"/>Timers</text:h>
      <text:p text:style-name="P7">Timers are used to time events, etc. The system provides up to 3 programmable timers.<text:line-break/>Timers can be configured to count up or count down.<text:line-break/>In count down mode, an audible alarm is played when the timer reaches zero. The timer continues to count with a negative sign.</text:p>
      <text:p text:style-name="P7"><draw:frame draw:style-name="fr1" draw:name="Picture 18" text:anchor-type="as-char" svg:width="6.773cm" svg:height="3.387cm" draw:z-index="17"><draw:image xlink:href="Pictures/100000000000010000000080CB39AF7C.png" xlink:type="simple" xlink:show="embed" xlink:actuate="onLoad" draw:mime-type="image/png"/><svg:desc>D:\Ba\rc radio project\New stuff\Beta40\doc\images\screenshots\timers.png</svg:desc></draw:frame></text:p>
      <text:p text:style-name="Standard">Fields</text:p>
      <text:list text:style-name="WWNum14">
        <text:list-item>
          <text:p text:style-name="P50">Name: A name for the timer, otherwise a generic name is used.</text:p>
        </text:list-item>
        <text:list-item>
          <text:p text:style-name="P51">Switch: The control switch used to start and stop the timer. This is optional, as the timer can also be started or stopped from the context menu.</text:p>
        </text:list-item>
        <text:list-item>
          <text:p text:style-name="P51">Reset: The control switch used to reset the timer. This is optional, as the timer can also be reset from the context menu.</text:p>
        </text:list-item>
        <text:list-item>
          <text:p text:style-name="P51">Initial: The initial time if a countdown timer. If not specified, the timer will count up. A time picker dialog is used to easily set the initial time.</text:p>
        </text:list-item>
        <text:list-item>
          <text:p text:style-name="P52">Persist: Whether the timer is persistent i.e. if the value should be remembered between sessions.</text:p>
        </text:list-item>
      </text:list>
      <text:h text:style-name="Heading_20_2" text:outline-level="2">Examples</text:h>
      <text:list text:style-name="WWNum15">
        <text:list-item>
          <text:p text:style-name="P53"><text:a xlink:type="simple" xlink:href="#Example 3: Stopwatch operated by a single momentary switch for start/stop and reset|outline" text:style-name="Internet_20_link" text:visited-style-name="Visited_20_Internet_20_Link"><text:span text:style-name="Internet_20_link">Stopwatch operated by a single momentary switch</text:span></text:a></text:p>
        </text:list-item>
        <text:list-item>
          <text:p text:style-name="P54"><text:a xlink:type="simple" xlink:href="#Example 4: Throttle timer (simple)|outline" text:style-name="Internet_20_link" text:visited-style-name="Visited_20_Internet_20_Link"><text:span text:style-name="Internet_20_link">Throttle timer - simple</text:span></text:a></text:p>
        </text:list-item>
        <text:list-item>
          <text:p text:style-name="P55"><text:a xlink:type="simple" xlink:href="#Example 5: Throttle timer (advanced)|outline" text:style-name="Internet_20_link" text:visited-style-name="Visited_20_Internet_20_Link"><text:span text:style-name="Internet_20_link">Throttle timer - advanced</text:span></text:a></text:p>
        </text:list-item>
      </text:list>
      <text:p text:style-name="Standard"/>
      <text:h text:style-name="P5" text:outline-level="1"><text:bookmark text:name="_Counters"/>Counters</text:h>
      <text:p text:style-name="P7">A counters stores and shows the number of times a particular event has occurred, in relationship to a clock signal.</text:p>
      <text:p text:style-name="P7"><draw:frame draw:style-name="fr1" draw:name="Picture 20" text:anchor-type="as-char" svg:width="6.773cm" svg:height="5.08cm" draw:z-index="18"><draw:image xlink:href="Pictures/1000000100000100000000C01CFFD8F8.png" xlink:type="simple" xlink:show="embed" xlink:actuate="onLoad" draw:mime-type="image/png"/><svg:desc>D:\Ba\rc radio project\New stuff\Beta40\doc\images\screenshots\counters_basic.png</svg:desc></draw:frame><text:s text:c="4"/><draw:frame draw:style-name="fr1" draw:name="Picture 19" text:anchor-type="as-char" svg:width="6.773cm" svg:height="5.08cm" draw:z-index="19"><draw:image xlink:href="Pictures/1000000100000100000000C00374513B.png" xlink:type="simple" xlink:show="embed" xlink:actuate="onLoad" draw:mime-type="image/png"/><svg:desc>D:\Ba\rc radio project\New stuff\Beta40\doc\images\screenshots\counters_advanced.png</svg:desc></draw:frame></text:p>
      <text:p text:style-name="Standard">Fields</text:p>
      <text:list text:style-name="WWNum16">
        <text:list-item>
          <text:p text:style-name="P56">Clock: The control switch that triggers the counter.</text:p>
        </text:list-item>
        <text:list-item>
          <text:p text:style-name="P57">Edge: Rising, Falling, or Dual edge triggering. Applies to the clock signal.</text:p>
        </text:list-item>
        <text:list-item>
          <text:p text:style-name="P57">Clear: The control switch that clears the counter register to zero.</text:p>
        </text:list-item>
        <text:list-item>
          <text:p text:style-name="P57">Modulus: The number of states in its count sequence. E.g. mod 4 produces the sequence 0, 1, 2, 3.</text:p>
        </text:list-item>
        <text:list-item>
          <text:p text:style-name="P57">Direction: Determines whether counts will increment or decrement.</text:p>
        </text:list-item>
        <text:list-item>
          <text:p text:style-name="P57">Rollover: Rolls back over to start counting again from zero.</text:p>
        </text:list-item>
        <text:list-item>
          <text:p text:style-name="P58">Persist: Whether to remember the value in the counter's register between sessions.</text:p>
        </text:list-item>
      </text:list>
      <text:p text:style-name="P7">In advanced mode, the counter behaves as an up/down counter using separate "up" and "down" clocks for increment and decrement respectively.</text:p>
      <text:h text:style-name="Heading_20_2" text:outline-level="2">Examples</text:h>
      <text:h text:style-name="Heading_20_3" text:outline-level="3">Example 1: Using a 3 position momentary switch to sequentially select among values.</text:h>
      <text:p text:style-name="P7">This example demonstrates use of the counter directly inside the mixer.<text:line-break/>When the momentary switch is pushed in the downward direction, the counter value increments. Similarly, pushing the momentary switch in the opposite direction decrements the counter value.<text:line-break/>In the counter screen context menu, change the counter type to advanced.<text:line-break/>Assuming SwG is our 3 position momentary switch, setup the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Inc clock: <text:s/>SwG_down</text:span></text:span></text:p>
      <text:p text:style-name="code_20_Style1"><text:span text:style-name="HTML_20_Code"><text:span text:style-name="T4">Inc edge: <text:s text:c="2"/>Rising</text:span></text:span></text:p>
      <text:p text:style-name="code_20_Style1"><text:span text:style-name="HTML_20_Code"><text:span text:style-name="T4">Dec clock: <text:s/>SwG_up</text:span></text:span></text:p>
      <text:p text:style-name="code_20_Style1"><text:span text:style-name="HTML_20_Code"><text:span text:style-name="T4">Dec edge: <text:s text:c="2"/>Rising</text:span></text:span></text:p>
      <text:p text:style-name="code_20_Style1"><text:span text:style-name="HTML_20_Code"><text:span text:style-name="T4">Modulus: <text:s text:c="3"/>4</text:span></text:span></text:p>
      <text:p text:style-name="code_20_Style1"><text:span text:style-name="HTML_20_Code"><text:span text:style-name="T4">Rollover: <text:s text:c="2"/>False</text:span></text:span></text:p>
      <text:p text:style-name="P7"><text:soft-page-break/>Then in the Mixer,</text:p>
      <text:p text:style-name="code_20_Style1"><text:span text:style-name="HTML_20_Code"><text:span text:style-name="T4">1. Ch1 <text:s/>Add <text:s/>Counter1 <text:s/>(Weight 100)</text:span></text:span></text:p>
      <text:p text:style-name="code_20_Style1"><text:span text:style-name="HTML_20_Code"><text:span text:style-name="T4"/></text:span></text:p>
      <text:p text:style-name="P7">Note: The mixer automatically maps the counter's value in proportion to the counter's modulus.<text:line-break/>For example if the modulus is 4, then mapping is {(0,-100), (1,-33), (2,33), (3,100)}.</text:p>
      <text:p text:style-name="Standard"/>
      <text:h text:style-name="P5" text:outline-level="1"><text:bookmark text:name="_Notifications"/>Notifications</text:h>
      <text:p text:style-name="P7">Notifications are user-programmable and provide audible alarms to report about events.</text:p>
      <text:p text:style-name="P7"><draw:frame draw:style-name="fr1" draw:name="Picture 21" text:anchor-type="as-char" svg:width="6.773cm" svg:height="3.387cm" draw:z-index="20"><draw:image xlink:href="Pictures/10000001000001000000008006FCE155.png" xlink:type="simple" xlink:show="embed" xlink:actuate="onLoad" draw:mime-type="image/png"/><svg:desc>D:\Ba\rc radio project\New stuff\Beta40\doc\images\screenshots\notifications.png</svg:desc></draw:frame></text:p>
      <text:p text:style-name="Standard">Fields</text:p>
      <text:list text:style-name="WWNum17">
        <text:list-item>
          <text:p text:style-name="P59">Enable: Whether the notification is enabled or disabled. Only enabled notifications will be sounded and displayed.</text:p>
        </text:list-item>
        <text:list-item>
          <text:p text:style-name="P60">Switch: The control switch used to trigger the notification. The notification gets only triggered on the positive going edge, i.e. when the state of the switch changes from low to high.</text:p>
        </text:list-item>
        <text:list-item>
          <text:p text:style-name="P60">Tone: The tune to play when the notification is triggered.</text:p>
        </text:list-item>
        <text:list-item>
          <text:p text:style-name="P61">Text: Optional text that will be displayed, as a toast message on the screen.</text:p>
        </text:list-item>
      </text:list>
      <text:p text:style-name="P7">Note: System events like low transmitter battery, inactivity, etc. are natively handled by the system, thus there is no need to configure them inside custom notifications.</text:p>
      <text:h text:style-name="Heading_20_2" text:outline-level="2">Usage examples</text:h>
      <text:list text:style-name="WWNum18">
        <text:list-item>
          <text:p text:style-name="P62"><text:a xlink:type="simple" xlink:href="#Example 8: Detecting receiver connection or disconnection|outline" text:style-name="Internet_20_link" text:visited-style-name="Visited_20_Internet_20_Link"><text:span text:style-name="Internet_20_link"><text:span text:style-name="T7">Detecting receiver connection or disconnection </text:span></text:span></text:a></text:p>
        </text:list-item>
      </text:list>
      <text:p text:style-name="Standard"/>
      <text:h text:style-name="P5" text:outline-level="1"><text:bookmark text:name="_Safety_checks"/>Safety checks</text:h>
      <text:p text:style-name="P7">These checks are done before loading a model and on start up.<text:line-break/>Positions of switches as well as the throttle source are checked, depending on the setting.<text:line-break/>A warning will be shown if the set conditions are not met.</text:p>
      <text:p text:style-name="P7"><draw:frame draw:style-name="fr1" draw:name="Picture 23" text:anchor-type="as-char" svg:width="6.773cm" svg:height="3.387cm" draw:z-index="21"><draw:image xlink:href="Pictures/1000000100000100000000801A7D5F20.png" xlink:type="simple" xlink:show="embed" xlink:actuate="onLoad" draw:mime-type="image/png"/><svg:desc>D:\Ba\rc radio project\New stuff\Beta40\doc\images\screenshots\safety_checks.png</svg:desc></draw:frame></text:p>
      <text:p text:style-name="P7"><draw:frame draw:style-name="fr1" draw:name="Picture 22" text:anchor-type="as-char" svg:width="6.773cm" svg:height="3.387cm" draw:z-index="22"><draw:image xlink:href="Pictures/100000010000010000000080CEDC7F9C.png" xlink:type="simple" xlink:show="embed" xlink:actuate="onLoad" draw:mime-type="image/png"/><svg:desc>D:\Ba\rc radio project\New stuff\Beta40\doc\images\screenshots\warning.png</svg:desc></draw:frame></text:p>
      <text:p text:style-name="Standard"/>
      <text:h text:style-name="P5" text:outline-level="1"><text:bookmark text:name="_Trim_setup"/>Trim setup</text:h>
      <text:p text:style-name="P14" loext:marker-style-name="T1"><draw:frame draw:style-name="fr1" draw:name="Picture 24" text:anchor-type="as-char" svg:width="6.773cm" svg:height="3.387cm" draw:z-index="23"><draw:image xlink:href="Pictures/100000010000010000000080259B99C1.png" xlink:type="simple" xlink:show="embed" xlink:actuate="onLoad" draw:mime-type="image/png"/><svg:desc>D:\Ba\rc radio project\New stuff\Beta40\doc\images\screenshots\trim_setup.png</svg:desc></draw:frame></text:p>
      <text:p text:style-name="P14" loext:marker-style-name="T1"><text:span text:style-name="T1">Available states are as follows.</text:span><text:span text:style-name="T1"/></text:p>
      <text:list text:style-name="WWNum19">
        <text:list-item>
          <text:p text:style-name="P63" loext:marker-style-name="T1"><text:span text:style-name="T1">Common: Applies the same trim value across all flight modes.</text:span><text:span text:style-name="T1"/></text:p>
        </text:list-item>
        <text:list-item>
          <text:p text:style-name="P64" loext:marker-style-name="T1"><text:span text:style-name="T1">F-mode: Applies independent trim settings for each flight mode.</text:span><text:span text:style-name="T1"/></text:p>
        </text:list-item>
        <text:list-item>
          <text:p text:style-name="P65" loext:marker-style-name="T1"><text:span text:style-name="T1">Off: Trim is disabled globally for this axis, for example when we do not want trim on the throttle.</text:span><text:span text:style-name="T1"/></text:p>
        </text:list-item>
      </text:list>
      <text:p text:style-name="P14" loext:marker-style-name="T1"><text:span text:style-name="T1">The Step setting determines how fast and how fine the trims move. Available options are Coarse, Medium, and Fine.</text:span><text:span text:style-name="T1"/></text:p>
      <text:p text:style-name="Standard"/>
      <text:h text:style-name="P5" text:outline-level="1"><text:bookmark text:name="_Flight_modes"/>Flight modes</text:h>
      <text:p text:style-name="P7">Flight modes allow you to easily reconfigure settings such as mixes and trim values with the simple flip of a switch. While it's possible to achieve similar adjustments using multiple switches, having the ability to make all these changes with just one switch is undoubtedly more efficient and convenient.</text:p>
      <text:p text:style-name="P7"><draw:frame draw:style-name="fr1" draw:name="Picture 25" text:anchor-type="as-char" svg:width="6.773cm" svg:height="3.387cm" draw:z-index="24"><draw:image xlink:href="Pictures/100000010000010000000080E4213904.png" xlink:type="simple" xlink:show="embed" xlink:actuate="onLoad" draw:mime-type="image/png"/><svg:desc>D:\Ba\rc radio project\New stuff\Beta40\doc\images\screenshots\flight_modes.png</svg:desc></draw:frame></text:p>
      <text:p text:style-name="Standard">Fields</text:p>
      <text:list text:style-name="WWNum20">
        <text:list-item>
          <text:p text:style-name="P66">Name: A name/label for this flight mode.</text:p>
        </text:list-item>
        <text:list-item>
          <text:p text:style-name="P67">Switch: The control switch that activates this flight mode.</text:p>
        </text:list-item>
        <text:list-item>
          <text:p text:style-name="P68">Fade-in: The transition time to effect the trim setting for this flight mode.</text:p>
        </text:list-item>
      </text:list>
      <text:p text:style-name="Standard"/>
      <text:h text:style-name="P5" text:outline-level="1"><text:bookmark text:name="_Telemetry"/>Telemetry</text:h>
      <text:p text:style-name="P7"><draw:frame draw:style-name="fr1" draw:name="Picture 28" text:anchor-type="as-char" svg:width="6.773cm" svg:height="3.387cm" draw:z-index="25"><draw:image xlink:href="Pictures/100000000000010000000080CE4096A4.png" xlink:type="simple" xlink:show="embed" xlink:actuate="onLoad" draw:mime-type="image/png"/><svg:desc>D:\Ba\rc radio project\New stuff\Beta40\doc\images\screenshots\telemetry.png</svg:desc></draw:frame></text:p>
      <text:h text:style-name="Heading_20_2" text:outline-level="2">General telemetry</text:h>
      <text:p text:style-name="P7">The receiver has built-in basic telemetry i.e. external voltage, RSSI, and packet rate. To measure other parameters, you will have to build custom sensors and extend the receiver firmware to support these.<text:line-break/>Telemetry values are transmitted as 16-bit signed integers.<text:line-break/>To quickly mute/unmute telemetry alarms, long press the Down key on the home screen.</text:p>
      <text:p text:style-name="P7"><draw:frame draw:style-name="fr1" draw:name="Picture 27" text:anchor-type="as-char" svg:width="6.773cm" svg:height="5.08cm" draw:z-index="26"><draw:image xlink:href="Pictures/1000000100000100000000C0B8158663.png" xlink:type="simple" xlink:show="embed" xlink:actuate="onLoad" draw:mime-type="image/png"/><svg:desc>D:\Ba\rc radio project\New stuff\Beta40\doc\images\screenshots\telemetry_sensor_edit.png</svg:desc></draw:frame></text:p>
      <text:p text:style-name="Standard">Fields</text:p>
      <text:list text:style-name="WWNum21">
        <text:list-item>
          <text:p text:style-name="P69">Name: The sensor name.</text:p>
        </text:list-item>
        <text:list-item>
          <text:p text:style-name="P70">Units: The units of measurement.</text:p>
        </text:list-item>
        <text:list-item>
          <text:p text:style-name="P70">ID: This is the sensor ID, which must be unique. However, the same ID can be used for example to display a value in multiple ways.</text:p>
        </text:list-item>
        <text:list-item>
          <text:p text:style-name="P70">Factor10: The raw value is multiplied by 10 to power this factor. Useful when we want to scale the value.</text:p>
        </text:list-item>
        <text:list-item>
          <text:p text:style-name="P70">Multiplier: The raw value is multiplied by this number. Useful when we want to scale the value.</text:p>
        </text:list-item>
        <text:list-item>
          <text:p text:style-name="P70">Alerts: This parameter specifies how the alarm behaves.</text:p>
        </text:list-item>
        <text:list-item>
          <text:p text:style-name="P70">Threshold: This is the value below or above which the telemetry alarm will be sounded. The telemetry value will also flash when in alarm state.</text:p>
        </text:list-item>
        <text:list-item>
          <text:p text:style-name="P70">On home: Whether to automatically show the telemetry sensor on the home screen.</text:p>
        </text:list-item>
        <text:list-item>
          <text:p text:style-name="P71">Record max, and record min: Whether to track the max/min values received from the sensor. Useful for simple stats. Note that max and min are sensitive to outliers hence the filtering and smoothing should be done before sending the telemetry to the transmitter.</text:p>
        </text:list-item>
      </text:list>
      <text:h text:style-name="Heading_20_2" text:outline-level="2"><text:soft-page-break/>GNSS telemetry</text:h>
      <text:p text:style-name="P7">GNSS telemetry is also supported. A premade template is used to add the GNSS sensor to the telemetry screen.<text:line-break/>The receiver directly connects to the GNSS/GPS module via serial (UART), and handles parsing of the NMEA sentences as well as data conversion. GPS, GLONASS, BeiDou, Galileo are supported.<text:line-break/>The system remembers the last known location in case of a lost model, even when the transmitter is powered off.</text:p>
      <text:p text:style-name="P7"><draw:frame draw:style-name="fr1" draw:name="Picture 26" text:anchor-type="as-char" svg:width="13.97cm" svg:height="7.197cm" draw:z-index="27"><draw:image xlink:href="Pictures/100000010000021000000110A71D3E18.png" xlink:type="simple" xlink:show="embed" xlink:actuate="onLoad" draw:mime-type="image/png"/><svg:desc>D:\Ba\rc radio project\New stuff\Beta40\doc\images\screenshots\telemetry_gnss.png</svg:desc></draw:frame></text:p>
      <text:p text:style-name="Standard">Fields</text:p>
      <text:list text:style-name="WWNum22">
        <text:list-item>
          <text:p text:style-name="P72">Satellites: The number of satellites in use / in view. "Fix" is appended when we have a position fix.</text:p>
        </text:list-item>
        <text:list-item>
          <text:p text:style-name="P73">Distance: The calculated distance between the model's current location and the home location (starting point). If the displayed distance is inaccurate, simply reset the starting point from the context menu.</text:p>
        </text:list-item>
        <text:list-item>
          <text:p text:style-name="P73">Speed: The current speed over ground in metres per second. Defaults to 0 when there is no incoming telemetry.</text:p>
        </text:list-item>
        <text:list-item>
          <text:p text:style-name="P73">Course: The current course over ground in degrees. Defaults to 0 when there is no incoming telemetry.</text:p>
        </text:list-item>
        <text:list-item>
          <text:p text:style-name="P73">Altitude AGL: The altitude above ground level in metres. If the value is inaccurate, reset it from the context menu.</text:p>
        </text:list-item>
        <text:list-item>
          <text:p text:style-name="P73">Altitude MSL: The altitude relative to mean sea level in metres.</text:p>
        </text:list-item>
        <text:list-item>
          <text:p text:style-name="P73">Latitude and Longitude: The location coordinates of the model. Displays the last known location when there is no incoming telemetry.</text:p>
        </text:list-item>
        <text:list-item>
          <text:p text:style-name="P74">Starting point: Displays the coordinates of the home location.</text:p>
        </text:list-item>
      </text:list>
      <text:p text:style-name="P7">Note: If different units of measurement are desired, use the provided GNSS sensor sub-templates (speed, distance, altitude) and change the multiplier and units.</text:p>
      <text:p text:style-name="Standard"/>
      <text:h text:style-name="P5" text:outline-level="1"><text:bookmark text:name="_System_settings"/>System settings</text:h>
      <text:p text:style-name="P7">The system menu offers comprehensive configuration options, allowing users to tailor the system to their needs.<text:line-break/>Entries are thoughtfully organized into categories for easy navigation and quick access to the desired settings.</text:p>
      <text:p text:style-name="P7"><draw:frame draw:style-name="fr1" draw:name="Picture 41" text:anchor-type="as-char" svg:width="6.773cm" svg:height="4.657cm" draw:z-index="28"><draw:image xlink:href="Pictures/1000000100000100000000B059BFFE49.png" xlink:type="simple" xlink:show="embed" xlink:actuate="onLoad" draw:mime-type="image/png"/><svg:desc>D:\Ba\rc radio project\New stuff\Beta40\doc\images\screenshots\system_menu.png</svg:desc></draw:frame></text:p>
      <text:p text:style-name="P7"><draw:frame draw:style-name="fr1" draw:name="Picture 40" text:anchor-type="as-char" svg:width="6.773cm" svg:height="3.387cm" draw:z-index="29"><draw:image xlink:href="Pictures/100000000000010000000080F21E3AC3.png" xlink:type="simple" xlink:show="embed" xlink:actuate="onLoad" draw:mime-type="image/png"/><svg:desc>D:\Ba\rc radio project\New stuff\Beta40\doc\images\screenshots\system_rf.png</svg:desc></draw:frame></text:p>
      <text:p text:style-name="P7"><draw:frame draw:style-name="fr1" draw:name="Picture 39" text:anchor-type="as-char" svg:width="6.773cm" svg:height="3.81cm" draw:z-index="30"><draw:image xlink:href="Pictures/10000000000001000000009058F652FB.png" xlink:type="simple" xlink:show="embed" xlink:actuate="onLoad" draw:mime-type="image/png"/><svg:desc>D:\Ba\rc radio project\New stuff\Beta40\doc\images\screenshots\system_sound.png</svg:desc></draw:frame></text:p>
      <text:p text:style-name="P7"><draw:frame draw:style-name="fr1" draw:name="Picture 38" text:anchor-type="as-char" svg:width="6.773cm" svg:height="3.387cm" draw:z-index="31"><draw:image xlink:href="Pictures/100000000000010000000080DFDF6914.png" xlink:type="simple" xlink:show="embed" xlink:actuate="onLoad" draw:mime-type="image/png"/><svg:desc>D:\Ba\rc radio project\New stuff\Beta40\doc\images\screenshots\system_backlight.png</svg:desc></draw:frame></text:p>
      <text:p text:style-name="P7"><text:soft-page-break/><draw:frame draw:style-name="fr1" draw:name="Picture 37" text:anchor-type="as-char" svg:width="6.773cm" svg:height="5.503cm" draw:z-index="32"><draw:image xlink:href="Pictures/1000000000000100000000D0E6950B89.png" xlink:type="simple" xlink:show="embed" xlink:actuate="onLoad" draw:mime-type="image/png"/><svg:desc>D:\Ba\rc radio project\New stuff\Beta40\doc\images\screenshots\system_appearance.png</svg:desc></draw:frame></text:p>
      <text:p text:style-name="P7"><draw:frame draw:style-name="fr1" draw:name="Picture 36" text:anchor-type="as-char" svg:width="6.773cm" svg:height="3.387cm" draw:z-index="33"><draw:image xlink:href="Pictures/100000000000010000000080700E106B.png" xlink:type="simple" xlink:show="embed" xlink:actuate="onLoad" draw:mime-type="image/png"/><svg:desc>D:\Ba\rc radio project\New stuff\Beta40\doc\images\screenshots\system_miscellaneous.png</svg:desc></draw:frame></text:p>
      <text:p text:style-name="P7"><draw:frame draw:style-name="fr1" draw:name="Picture 35" text:anchor-type="as-char" svg:width="6.773cm" svg:height="4.657cm" draw:z-index="34"><draw:image xlink:href="Pictures/1000000100000100000000B0A3A26201.png" xlink:type="simple" xlink:show="embed" xlink:actuate="onLoad" draw:mime-type="image/png"/><svg:desc>D:\Ba\rc radio project\New stuff\Beta40\doc\images\screenshots\system_advanced_menu.png</svg:desc></draw:frame></text:p>
      <text:p text:style-name="P7"><draw:frame draw:style-name="fr1" draw:name="Picture 34" text:anchor-type="as-char" svg:width="6.773cm" svg:height="3.387cm" draw:z-index="35"><draw:image xlink:href="Pictures/10000000000001000000008054F320BD.png" xlink:type="simple" xlink:show="embed" xlink:actuate="onLoad" draw:mime-type="image/png"/><svg:desc>D:\Ba\rc radio project\New stuff\Beta40\doc\images\screenshots\system_sticks.png</svg:desc></draw:frame></text:p>
      <text:p text:style-name="P7"><draw:frame draw:style-name="fr1" draw:name="Picture 33" text:anchor-type="as-char" svg:width="6.773cm" svg:height="3.387cm" draw:z-index="36"><draw:image xlink:href="Pictures/1000000000000100000000803B61DE4C.png" xlink:type="simple" xlink:show="embed" xlink:actuate="onLoad" draw:mime-type="image/png"/><svg:desc>D:\Ba\rc radio project\New stuff\Beta40\doc\images\screenshots\system_knobs.png</svg:desc></draw:frame></text:p>
      <text:p text:style-name="P7"><text:soft-page-break/><draw:frame draw:style-name="fr1" draw:name="Picture 32" text:anchor-type="as-char" svg:width="6.773cm" svg:height="3.387cm" draw:z-index="37"><draw:image xlink:href="Pictures/10000000000001000000008031C77CD9.png" xlink:type="simple" xlink:show="embed" xlink:actuate="onLoad" draw:mime-type="image/png"/><svg:desc>D:\Ba\rc radio project\New stuff\Beta40\doc\images\screenshots\system_switches.png</svg:desc></draw:frame></text:p>
      <text:p text:style-name="P7"><draw:frame draw:style-name="fr1" draw:name="Picture 31" text:anchor-type="as-char" svg:width="6.773cm" svg:height="3.387cm" draw:z-index="38"><draw:image xlink:href="Pictures/10000000000001000000008050663AC4.png" xlink:type="simple" xlink:show="embed" xlink:actuate="onLoad" draw:mime-type="image/png"/><svg:desc>D:\Ba\rc radio project\New stuff\Beta40\doc\images\screenshots\system_battery.png</svg:desc></draw:frame></text:p>
      <text:p text:style-name="P7"><draw:frame draw:style-name="fr1" draw:name="Picture 30" text:anchor-type="as-char" svg:width="6.773cm" svg:height="3.387cm" draw:z-index="39"><draw:image xlink:href="Pictures/100000000000010000000080CF265E69.png" xlink:type="simple" xlink:show="embed" xlink:actuate="onLoad" draw:mime-type="image/png"/><svg:desc>D:\Ba\rc radio project\New stuff\Beta40\doc\images\screenshots\system_security.png</svg:desc></draw:frame></text:p>
      <text:p text:style-name="P7"><draw:frame draw:style-name="fr2" draw:name="Image1" text:anchor-type="as-char" svg:width="6.798cm" svg:height="5.736cm" draw:z-index="42"><draw:image xlink:href="Pictures/1000000100000100000000D8F4858D4B.png" xlink:type="simple" xlink:show="embed" xlink:actuate="onLoad" draw:mime-type="image/png"/></draw:frame></text:p>
      <text:p text:style-name="Standard"/>
      <text:h text:style-name="P5" text:outline-level="1"><text:bookmark text:name="_Receiver"/>Receiver</text:h>
      <text:p text:style-name="P7">Each receiver supports up to 10 channels. To use all the 20 channels, two receivers are required.</text:p>
      <text:h text:style-name="Heading_20_2" text:outline-level="2">Binding to a receiver</text:h>
      <text:p text:style-name="P7">A receiver can be bound as either a main receiver or a secondary receiver. <text:line-break/>By default, RC channels 1 to 10 are handled by the main receiver, while RC channels 11 to 20 are handled by the secondary receiver. <text:line-break/>To bind the receiver, on the transmitter side access the receiver menu and select the bind option. Then cycle the power to the receiver. If the binding is successful, a "Success" toast message will be shown and a tune played.</text:p>
      <text:h text:style-name="Heading_20_2" text:outline-level="2">Configuring receiver outputs</text:h>
      <text:p text:style-name="P7">The receiver outputs can be configured from the transmitter to any of the three signal types; servo PWM, digital on-off, or 'normal' PWM. For example 'normal' PWM output can be used to control brushed DC motors without the need for complex electronics. The digital on-off output makes it easy to directly control components such as electromechanical relays and lights.<text:line-break/>The servo PWM range can as well be adjusted to get extra travel from a servo, without making physical modifications to the servo.</text:p>
      <text:p text:style-name="P7"><draw:frame draw:style-name="fr1" draw:name="Picture 43" text:anchor-type="as-char" svg:width="6.773cm" svg:height="3.387cm" draw:z-index="40"><draw:image xlink:href="Pictures/1000000100000100000000809A160DF8.png" xlink:type="simple" xlink:show="embed" xlink:actuate="onLoad" draw:mime-type="image/png"/><svg:desc>D:\Ba\rc radio project\New stuff\Beta40\doc\images\screenshots\receiver_config_signal_type.png</svg:desc></draw:frame><text:s text:c="4"/><draw:frame draw:style-name="fr1" draw:name="Picture 42" text:anchor-type="as-char" svg:width="6.773cm" svg:height="3.387cm" draw:z-index="41"><draw:image xlink:href="Pictures/10000001000001000000008070BA95A9.png" xlink:type="simple" xlink:show="embed" xlink:actuate="onLoad" draw:mime-type="image/png"/><svg:desc>D:\Ba\rc radio project\New stuff\Beta40\doc\images\screenshots\receiver_config_servo_pwm_range.png</svg:desc></draw:frame></text:p>
      <text:p text:style-name="P7">Note:</text:p>
      <text:list text:style-name="WWNum23">
        <text:list-item>
          <text:p text:style-name="P75">These configuration settings are stored in the receiver, not the transmitter.</text:p>
        </text:list-item>
        <text:list-item>
          <text:p text:style-name="P76">Normal PWM is only available on certain pins, depending on the pin mapping.</text:p>
        </text:list-item>
        <text:list-item>
          <text:p text:style-name="P76">Any changes made take effect immediately upon pressing the 'Write' button.</text:p>
        </text:list-item>
        <text:list-item>
          <text:p text:style-name="P76">In digital on-off mode, the output value range of -100 to -50 corresponds to LOW, -49 to 49 is ignored, and 50 to 100 corresponds to HIGH.</text:p>
        </text:list-item>
        <text:list-item>
          <text:p text:style-name="P77">When reusing a receiver between models, always check and set the appropriate signal format before connecting any actuators to the receive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Liberation Serif2" fo:font-family="'Liberation Serif'" style:font-style-name="Regular"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Liberation Serif1" fo:font-family="'Liberation Serif'" style:font-style-name="Bold"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71cm" fo:margin-bottom="0cm" style:contextual-spacing="false" fo:keep-together="always" fo:keep-with-next="always"/>
      <style:text-properties style:font-name="Liberation Serif1" fo:font-family="'Liberation Serif'" style:font-style-name="Bold"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71cm" fo:margin-bottom="0cm" style:contextual-spacing="false" fo:keep-together="always" fo:keep-with-next="always"/>
      <style:text-properties fo:color="#2e74b5" loext:opacity="100%" style:font-name-asian="Calibri2" style:font-family-asian="Calibri" style:font-family-generic-asian="system" style:font-pitch-asian="variable"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Liberation Serif2" fo:font-family="'Liberation Serif'" style:font-style-name="Regular"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HTML_20_Preformatted" style:display-name="HTML Preformatted" style:family="paragraph" loext:linked-style-name="HTML_20_Preformatted_20_Char" style:class="html" style:master-page-name="">
      <style:paragraph-properties fo:margin-top="0cm" fo:margin-bottom="0cm" style:contextual-spacing="false" fo:line-height="100%" style:page-number="auto">
        <style:tab-stops/>
      </style:paragraph-properties>
      <style:text-properties style:font-name="Liberation Mono" fo:font-family="'Liberation Mono'" style:font-style-name="Regular" style:font-family-generic="modern" style:font-pitch="fixed"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code_20_Style1" style:display-name="code Style1" style:family="paragraph" style:parent-style-name="HTML_20_Preformatted" loext:linked-style-name="code_20_Style1_20_Char" style:master-page-name="">
      <loext:graphic-properties draw:fill="solid" draw:fill-color="#f2f2f2" draw:gradient-step-count="0"/>
      <style:paragraph-properties style:page-number="auto" fo:background-color="#f2f2f2"/>
      <style:text-properties style:use-window-font-color="true" loext:opacity="0%" style:font-name="Liberation Mono" fo:font-family="'Liberation Mono'" style:font-style-name="Regular" style:font-family-generic="modern" style:font-pitch="fixed" fo:font-size="10pt" fo:background-color="transparen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fo:color="#2e74b5"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de_20_Style1_20_Char" style:display-name="code Style1 Char" style:family="text" style:parent-style-name="HTML_20_Preformatted_20_Char" loext:linked-style-name="code_20_Style1">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text-properties style:font-name="Calibri1" fo:font-family="Calibri" style:font-family-generic="roman"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text-properties style:font-name="Calibri1" fo:font-family="Calibri" style:font-family-generic="roman" style:font-pitch="variable" fo:font-size="10pt" style:font-size-asian="10pt"/>
    </style:style>
    <style:style style:name="ListLabel_20_29" style:display-name="ListLabel 29" style:family="text">
      <style:text-properties style:font-name="Calibri" fo:font-family="Calibri" style:font-pitch="variable" fo:font-size="10pt" style:font-size-asian="10pt"/>
    </style:style>
    <style:style style:name="ListLabel_20_30" style:display-name="ListLabel 30" style:family="text">
      <style:text-properties style:font-name="Calibri" fo:font-family="Calibri" style:font-pitch="variable" fo:font-size="10pt" style:font-size-asian="10pt"/>
    </style:style>
    <style:style style:name="ListLabel_20_31" style:display-name="ListLabel 31" style:family="text">
      <style:text-properties style:font-name="Calibri" fo:font-family="Calibri" style:font-pitch="variable" fo:font-size="10pt" style:font-size-asian="10pt"/>
    </style:style>
    <style:style style:name="ListLabel_20_32" style:display-name="ListLabel 32" style:family="text">
      <style:text-properties style:font-name="Calibri" fo:font-family="Calibri" style:font-pitch="variable" fo:font-size="10pt" style:font-size-asian="10pt"/>
    </style:style>
    <style:style style:name="ListLabel_20_33" style:display-name="ListLabel 33" style:family="text">
      <style:text-properties style:font-name="Calibri" fo:font-family="Calibri" style:font-pitch="variable" fo:font-size="10pt" style:font-size-asian="10pt"/>
    </style:style>
    <style:style style:name="ListLabel_20_34" style:display-name="ListLabel 34" style:family="text">
      <style:text-properties style:font-name="Calibri" fo:font-family="Calibri" style:font-pitch="variable" fo:font-size="10pt" style:font-size-asian="10pt"/>
    </style:style>
    <style:style style:name="ListLabel_20_35" style:display-name="ListLabel 35" style:family="text">
      <style:text-properties style:font-name="Calibri" fo:font-family="Calibri" style:font-pitch="variable" fo:font-size="10pt" style:font-size-asian="10pt"/>
    </style:style>
    <style:style style:name="ListLabel_20_36" style:display-name="ListLabel 36" style:family="text">
      <style:text-properties style:font-name="Calibri" fo:font-family="Calibri" style:font-pitch="variable"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text-properties style:font-name="Calibri1" fo:font-family="Calibri" style:font-family-generic="roman" style:font-pitch="variable" fo:font-size="10pt" style:font-size-asian="10pt"/>
    </style:style>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text-properties style:font-name="Calibri" fo:font-family="Calibri" style:font-pitch="variable" fo:font-size="10pt" style:font-size-asian="10pt"/>
    </style:style>
    <style:style style:name="ListLabel_20_58" style:display-name="ListLabel 58" style:family="text">
      <style:text-properties style:font-name="Calibri" fo:font-family="Calibri" style:font-pitch="variable" fo:font-size="10pt" style:font-size-asian="10pt"/>
    </style:style>
    <style:style style:name="ListLabel_20_59" style:display-name="ListLabel 59" style:family="text">
      <style:text-properties style:font-name="Calibri" fo:font-family="Calibri" style:font-pitch="variable" fo:font-size="10pt" style:font-size-asian="10pt"/>
    </style:style>
    <style:style style:name="ListLabel_20_60" style:display-name="ListLabel 60" style:family="text">
      <style:text-properties style:font-name="Calibri" fo:font-family="Calibri" style:font-pitch="variable" fo:font-size="10pt" style:font-size-asian="10pt"/>
    </style:style>
    <style:style style:name="ListLabel_20_61" style:display-name="ListLabel 61" style:family="text">
      <style:text-properties style:font-name="Calibri" fo:font-family="Calibri" style:font-pitch="variable" fo:font-size="10pt" style:font-size-asian="10pt"/>
    </style:style>
    <style:style style:name="ListLabel_20_62" style:display-name="ListLabel 62" style:family="text">
      <style:text-properties style:font-name="Calibri" fo:font-family="Calibri" style:font-pitch="variable" fo:font-size="10pt" style:font-size-asian="10pt"/>
    </style:style>
    <style:style style:name="ListLabel_20_63" style:display-name="ListLabel 63" style:family="text">
      <style:text-properties style:font-name="Calibri" fo:font-family="Calibri" style:font-pitch="variable" fo:font-size="10pt" style:font-size-asian="10pt"/>
    </style:style>
    <style:style style:name="ListLabel_20_64" style:display-name="ListLabel 64" style:family="text">
      <style:text-properties style:font-name="Calibri1" fo:font-family="Calibri" style:font-family-generic="roman" style:font-pitch="variable" fo:font-size="10pt" style:font-size-asian="10pt"/>
    </style:style>
    <style:style style:name="ListLabel_20_65" style:display-name="ListLabel 65" style:family="text">
      <style:text-properties style:font-name="Calibri" fo:font-family="Calibri" style:font-pitch="variable" fo:font-size="10pt" style:font-size-asian="10pt"/>
    </style:style>
    <style:style style:name="ListLabel_20_66" style:display-name="ListLabel 66" style:family="text">
      <style:text-properties style:font-name="Calibri" fo:font-family="Calibri" style:font-pitch="variable" fo:font-size="10pt" style:font-size-asian="10pt"/>
    </style:style>
    <style:style style:name="ListLabel_20_67" style:display-name="ListLabel 67" style:family="text">
      <style:text-properties style:font-name="Calibri" fo:font-family="Calibri" style:font-pitch="variable" fo:font-size="10pt" style:font-size-asian="10pt"/>
    </style:style>
    <style:style style:name="ListLabel_20_68" style:display-name="ListLabel 68" style:family="text">
      <style:text-properties style:font-name="Calibri" fo:font-family="Calibri" style:font-pitch="variable" fo:font-size="10pt" style:font-size-asian="10pt"/>
    </style:style>
    <style:style style:name="ListLabel_20_69" style:display-name="ListLabel 69" style:family="text">
      <style:text-properties style:font-name="Calibri" fo:font-family="Calibri" style:font-pitch="variable" fo:font-size="10pt" style:font-size-asian="10pt"/>
    </style:style>
    <style:style style:name="ListLabel_20_70" style:display-name="ListLabel 70" style:family="text">
      <style:text-properties style:font-name="Calibri" fo:font-family="Calibri" style:font-pitch="variable" fo:font-size="10pt" style:font-size-asian="10pt"/>
    </style:style>
    <style:style style:name="ListLabel_20_71" style:display-name="ListLabel 71" style:family="text">
      <style:text-properties style:font-name="Calibri" fo:font-family="Calibri" style:font-pitch="variable" fo:font-size="10pt" style:font-size-asian="10pt"/>
    </style:style>
    <style:style style:name="ListLabel_20_72" style:display-name="ListLabel 72" style:family="text">
      <style:text-properties style:font-name="Calibri" fo:font-family="Calibri" style:font-pitch="variable" fo:font-size="10pt" style:font-size-asian="10pt"/>
    </style:style>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text-properties style:font-name="Calibri1" fo:font-family="Calibri" style:font-family-generic="roman" style:font-pitch="variable" fo:font-size="10pt" style:font-size-asian="10pt"/>
    </style:style>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text-properties style:font-name="Calibri" fo:font-family="Calibri" style:font-pitch="variable" fo:font-size="10pt" style:font-size-asian="10pt"/>
    </style:style>
    <style:style style:name="ListLabel_20_86" style:display-name="ListLabel 86" style:family="text">
      <style:text-properties style:font-name="Calibri" fo:font-family="Calibri" style:font-pitch="variable" fo:font-size="10pt" style:font-size-asian="10pt"/>
    </style:style>
    <style:style style:name="ListLabel_20_87" style:display-name="ListLabel 87" style:family="text">
      <style:text-properties style:font-name="Calibri" fo:font-family="Calibri" style:font-pitch="variable" fo:font-size="10pt" style:font-size-asian="10pt"/>
    </style:style>
    <style:style style:name="ListLabel_20_88" style:display-name="ListLabel 88" style:family="text">
      <style:text-properties style:font-name="Calibri" fo:font-family="Calibri" style:font-pitch="variable" fo:font-size="10pt" style:font-size-asian="10pt"/>
    </style:style>
    <style:style style:name="ListLabel_20_89" style:display-name="ListLabel 89" style:family="text">
      <style:text-properties style:font-name="Calibri" fo:font-family="Calibri" style:font-pitch="variable" fo:font-size="10pt" style:font-size-asian="10pt"/>
    </style:style>
    <style:style style:name="ListLabel_20_90" style:display-name="ListLabel 90" style:family="text">
      <style:text-properties style:font-name="Calibri" fo:font-family="Calibri" style:font-pitch="variable" fo:font-size="10pt" style:font-size-asian="10pt"/>
    </style:style>
    <style:style style:name="ListLabel_20_91" style:display-name="ListLabel 91" style:family="text">
      <style:text-properties style:font-name="Calibri1" fo:font-family="Calibri" style:font-family-generic="roman"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style:style style:name="ListLabel_20_100" style:display-name="ListLabel 100" style:family="text">
      <style:text-properties style:font-name="Calibri1" fo:font-family="Calibri" style:font-family-generic="roman" style:font-pitch="variable" fo:font-size="10pt" style:font-size-asian="10pt"/>
    </style:style>
    <style:style style:name="ListLabel_20_101" style:display-name="ListLabel 101" style:family="text">
      <style:text-properties style:font-name="Calibri" fo:font-family="Calibri" style:font-pitch="variable" fo:font-size="10pt" style:font-size-asian="10pt"/>
    </style:style>
    <style:style style:name="ListLabel_20_102" style:display-name="ListLabel 102" style:family="text">
      <style:text-properties style:font-name="Calibri" fo:font-family="Calibri" style:font-pitch="variable" fo:font-size="10pt" style:font-size-asian="10pt"/>
    </style:style>
    <style:style style:name="ListLabel_20_103" style:display-name="ListLabel 103" style:family="text">
      <style:text-properties style:font-name="Calibri" fo:font-family="Calibri" style:font-pitch="variable" fo:font-size="10pt" style:font-size-asian="10pt"/>
    </style:style>
    <style:style style:name="ListLabel_20_104" style:display-name="ListLabel 104" style:family="text">
      <style:text-properties style:font-name="Calibri" fo:font-family="Calibri" style:font-pitch="variable" fo:font-size="10pt" style:font-size-asian="10pt"/>
    </style:style>
    <style:style style:name="ListLabel_20_105" style:display-name="ListLabel 105" style:family="text">
      <style:text-properties style:font-name="Calibri" fo:font-family="Calibri" style:font-pitch="variable" fo:font-size="10pt" style:font-size-asian="10pt"/>
    </style:style>
    <style:style style:name="ListLabel_20_106" style:display-name="ListLabel 106" style:family="text">
      <style:text-properties style:font-name="Calibri" fo:font-family="Calibri" style:font-pitch="variable" fo:font-size="10pt" style:font-size-asian="10pt"/>
    </style:style>
    <style:style style:name="ListLabel_20_107" style:display-name="ListLabel 107" style:family="text">
      <style:text-properties style:font-name="Calibri" fo:font-family="Calibri" style:font-pitch="variable" fo:font-size="10pt" style:font-size-asian="10pt"/>
    </style:style>
    <style:style style:name="ListLabel_20_108" style:display-name="ListLabel 108" style:family="text">
      <style:text-properties style:font-name="Calibri" fo:font-family="Calibri" style:font-pitch="variable" fo:font-size="10pt" style:font-size-asian="10pt"/>
    </style:style>
    <style:style style:name="ListLabel_20_109" style:display-name="ListLabel 109" style:family="text">
      <style:text-properties style:font-name="Calibri1" fo:font-family="Calibri" style:font-family-generic="roman" style:font-pitch="variable" fo:font-size="10pt" style:font-size-asian="10pt"/>
    </style:style>
    <style:style style:name="ListLabel_20_110" style:display-name="ListLabel 110" style:family="text">
      <style:text-properties style:font-name="Calibri" fo:font-family="Calibri" style:font-pitch="variable" fo:font-size="10pt" style:font-size-asian="10pt"/>
    </style:style>
    <style:style style:name="ListLabel_20_111" style:display-name="ListLabel 111" style:family="text">
      <style:text-properties style:font-name="Calibri" fo:font-family="Calibri" style:font-pitch="variable" fo:font-size="10pt" style:font-size-asian="10pt"/>
    </style:style>
    <style:style style:name="ListLabel_20_112" style:display-name="ListLabel 112" style:family="text">
      <style:text-properties style:font-name="Calibri" fo:font-family="Calibri" style:font-pitch="variable" fo:font-size="10pt" style:font-size-asian="10pt"/>
    </style:style>
    <style:style style:name="ListLabel_20_113" style:display-name="ListLabel 113" style:family="text">
      <style:text-properties style:font-name="Calibri" fo:font-family="Calibri" style:font-pitch="variable" fo:font-size="10pt" style:font-size-asian="10pt"/>
    </style:style>
    <style:style style:name="ListLabel_20_114" style:display-name="ListLabel 114" style:family="text">
      <style:text-properties style:font-name="Calibri" fo:font-family="Calibri" style:font-pitch="variable" fo:font-size="10pt" style:font-size-asian="10pt"/>
    </style:style>
    <style:style style:name="ListLabel_20_115" style:display-name="ListLabel 115" style:family="text">
      <style:text-properties style:font-name="Calibri" fo:font-family="Calibri" style:font-pitch="variable" fo:font-size="10pt" style:font-size-asian="10pt"/>
    </style:style>
    <style:style style:name="ListLabel_20_116" style:display-name="ListLabel 116" style:family="text">
      <style:text-properties style:font-name="Calibri" fo:font-family="Calibri" style:font-pitch="variable" fo:font-size="10pt" style:font-size-asian="10pt"/>
    </style:style>
    <style:style style:name="ListLabel_20_117" style:display-name="ListLabel 117" style:family="text">
      <style:text-properties style:font-name="Calibri" fo:font-family="Calibri" style:font-pitch="variable" fo:font-size="10pt" style:font-size-asian="10pt"/>
    </style:style>
    <style:style style:name="ListLabel_20_118" style:display-name="ListLabel 118" style:family="text">
      <style:text-properties style:font-name="Calibri1" fo:font-family="Calibri" style:font-family-generic="roman" style:font-pitch="variable" fo:font-size="10pt" style:font-size-asian="10pt"/>
    </style:style>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text-properties style:font-name="Calibri" fo:font-family="Calibri" style:font-pitch="variable" fo:font-size="10pt" style:font-size-asian="10pt"/>
    </style:style>
    <style:style style:name="ListLabel_20_121" style:display-name="ListLabel 121" style:family="text">
      <style:text-properties style:font-name="Calibri" fo:font-family="Calibri" style:font-pitch="variable" fo:font-size="10pt" style:font-size-asian="10pt"/>
    </style:style>
    <style:style style:name="ListLabel_20_122" style:display-name="ListLabel 122" style:family="text">
      <style:text-properties style:font-name="Calibri" fo:font-family="Calibri" style:font-pitch="variable" fo:font-size="10pt" style:font-size-asian="10pt"/>
    </style:style>
    <style:style style:name="ListLabel_20_123" style:display-name="ListLabel 123" style:family="text">
      <style:text-properties style:font-name="Calibri" fo:font-family="Calibri" style:font-pitch="variable" fo:font-size="10pt" style:font-size-asian="10pt"/>
    </style:style>
    <style:style style:name="ListLabel_20_124" style:display-name="ListLabel 124" style:family="text">
      <style:text-properties style:font-name="Calibri" fo:font-family="Calibri" style:font-pitch="variable" fo:font-size="10pt" style:font-size-asian="10pt"/>
    </style:style>
    <style:style style:name="ListLabel_20_125" style:display-name="ListLabel 125" style:family="text">
      <style:text-properties style:font-name="Calibri" fo:font-family="Calibri" style:font-pitch="variable" fo:font-size="10pt" style:font-size-asian="10pt"/>
    </style:style>
    <style:style style:name="ListLabel_20_126" style:display-name="ListLabel 126" style:family="text">
      <style:text-properties style:font-name="Calibri" fo:font-family="Calibri" style:font-pitch="variable" fo:font-size="10pt" style:font-size-asian="10pt"/>
    </style:style>
    <style:style style:name="ListLabel_20_127" style:display-name="ListLabel 127" style:family="text">
      <style:text-properties style:font-name="Calibri1" fo:font-family="Calibri" style:font-family-generic="roman" style:font-pitch="variable" fo:font-size="10pt" style:font-size-asian="10pt"/>
    </style:style>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text-properties style:font-name="Calibri" fo:font-family="Calibri" style:font-pitch="variable" fo:font-size="10pt" style:font-size-asian="10pt"/>
    </style:style>
    <style:style style:name="ListLabel_20_130" style:display-name="ListLabel 130" style:family="text">
      <style:text-properties style:font-name="Calibri" fo:font-family="Calibri" style:font-pitch="variable" fo:font-size="10pt" style:font-size-asian="10pt"/>
    </style:style>
    <style:style style:name="ListLabel_20_131" style:display-name="ListLabel 131" style:family="text">
      <style:text-properties style:font-name="Calibri" fo:font-family="Calibri" style:font-pitch="variable" fo:font-size="10pt" style:font-size-asian="10pt"/>
    </style:style>
    <style:style style:name="ListLabel_20_132" style:display-name="ListLabel 132" style:family="text">
      <style:text-properties style:font-name="Calibri" fo:font-family="Calibri" style:font-pitch="variable" fo:font-size="10pt" style:font-size-asian="10pt"/>
    </style:style>
    <style:style style:name="ListLabel_20_133" style:display-name="ListLabel 133" style:family="text">
      <style:text-properties style:font-name="Calibri" fo:font-family="Calibri" style:font-pitch="variable" fo:font-size="10pt" style:font-size-asian="10pt"/>
    </style:style>
    <style:style style:name="ListLabel_20_134" style:display-name="ListLabel 134" style:family="text">
      <style:text-properties style:font-name="Calibri" fo:font-family="Calibri" style:font-pitch="variable" fo:font-size="10pt" style:font-size-asian="10pt"/>
    </style:style>
    <style:style style:name="ListLabel_20_135" style:display-name="ListLabel 135" style:family="text">
      <style:text-properties style:font-name="Calibri" fo:font-family="Calibri" style:font-pitch="variable" fo:font-size="10pt" style:font-size-asian="10pt"/>
    </style:style>
    <style:style style:name="ListLabel_20_136" style:display-name="ListLabel 136" style:family="text">
      <style:text-properties style:font-name="Calibri1" fo:font-family="Calibri" style:font-family-generic="roman"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ListLabel_20_145" style:display-name="ListLabel 145" style:family="text">
      <style:text-properties style:font-name="Calibri1" fo:font-family="Calibri" style:font-family-generic="roman"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54" style:display-name="ListLabel 154" style:family="text">
      <style:text-properties style:font-name="Calibri1" fo:font-family="Calibri" style:font-family-generic="roman" style:font-pitch="variable" fo:font-size="10pt" style:font-size-asian="10pt"/>
    </style:style>
    <style:style style:name="ListLabel_20_155" style:display-name="ListLabel 155" style:family="text">
      <style:text-properties style:font-name="Calibri" fo:font-family="Calibri" style:font-pitch="variable" fo:font-size="10pt" style:font-size-asian="10pt"/>
    </style:style>
    <style:style style:name="ListLabel_20_156" style:display-name="ListLabel 156" style:family="text">
      <style:text-properties style:font-name="Calibri" fo:font-family="Calibri" style:font-pitch="variable" fo:font-size="10pt" style:font-size-asian="10pt"/>
    </style:style>
    <style:style style:name="ListLabel_20_157" style:display-name="ListLabel 157" style:family="text">
      <style:text-properties style:font-name="Calibri" fo:font-family="Calibri" style:font-pitch="variable" fo:font-size="10pt" style:font-size-asian="10pt"/>
    </style:style>
    <style:style style:name="ListLabel_20_158" style:display-name="ListLabel 158" style:family="text">
      <style:text-properties style:font-name="Calibri" fo:font-family="Calibri" style:font-pitch="variable" fo:font-size="10pt" style:font-size-asian="10pt"/>
    </style:style>
    <style:style style:name="ListLabel_20_159" style:display-name="ListLabel 159" style:family="text">
      <style:text-properties style:font-name="Calibri" fo:font-family="Calibri" style:font-pitch="variable" fo:font-size="10pt" style:font-size-asian="10pt"/>
    </style:style>
    <style:style style:name="ListLabel_20_160" style:display-name="ListLabel 160" style:family="text">
      <style:text-properties style:font-name="Calibri" fo:font-family="Calibri" style:font-pitch="variable" fo:font-size="10pt" style:font-size-asian="10pt"/>
    </style:style>
    <style:style style:name="ListLabel_20_161" style:display-name="ListLabel 161" style:family="text">
      <style:text-properties style:font-name="Calibri" fo:font-family="Calibri" style:font-pitch="variable" fo:font-size="10pt" style:font-size-asian="10pt"/>
    </style:style>
    <style:style style:name="ListLabel_20_162" style:display-name="ListLabel 162" style:family="text">
      <style:text-properties style:font-name="Calibri" fo:font-family="Calibri" style:font-pitch="variable" fo:font-size="10pt" style:font-size-asian="10pt"/>
    </style:style>
    <style:style style:name="ListLabel_20_163" style:display-name="ListLabel 163" style:family="text">
      <style:text-properties style:font-name="Calibri1" fo:font-family="Calibri" style:font-family-generic="roman" style:font-pitch="variable" fo:font-size="10pt" style:font-size-asian="10pt"/>
    </style:style>
    <style:style style:name="ListLabel_20_164" style:display-name="ListLabel 164" style:family="text">
      <style:text-properties style:font-name="Calibri" fo:font-family="Calibri" style:font-pitch="variable" fo:font-size="10pt" style:font-size-asian="10pt"/>
    </style:style>
    <style:style style:name="ListLabel_20_165" style:display-name="ListLabel 165" style:family="text">
      <style:text-properties style:font-name="Calibri" fo:font-family="Calibri" style:font-pitch="variable" fo:font-size="10pt" style:font-size-asian="10pt"/>
    </style:style>
    <style:style style:name="ListLabel_20_166" style:display-name="ListLabel 166" style:family="text">
      <style:text-properties style:font-name="Calibri" fo:font-family="Calibri" style:font-pitch="variable" fo:font-size="10pt" style:font-size-asian="10pt"/>
    </style:style>
    <style:style style:name="ListLabel_20_167" style:display-name="ListLabel 167" style:family="text">
      <style:text-properties style:font-name="Calibri" fo:font-family="Calibri" style:font-pitch="variable" fo:font-size="10pt" style:font-size-asian="10pt"/>
    </style:style>
    <style:style style:name="ListLabel_20_168" style:display-name="ListLabel 168" style:family="text">
      <style:text-properties style:font-name="Calibri" fo:font-family="Calibri" style:font-pitch="variable" fo:font-size="10pt" style:font-size-asian="10pt"/>
    </style:style>
    <style:style style:name="ListLabel_20_169" style:display-name="ListLabel 169" style:family="text">
      <style:text-properties style:font-name="Calibri" fo:font-family="Calibri" style:font-pitch="variable" fo:font-size="10pt" style:font-size-asian="10pt"/>
    </style:style>
    <style:style style:name="ListLabel_20_170" style:display-name="ListLabel 170" style:family="text">
      <style:text-properties style:font-name="Calibri" fo:font-family="Calibri" style:font-pitch="variable" fo:font-size="10pt" style:font-size-asian="10pt"/>
    </style:style>
    <style:style style:name="ListLabel_20_171" style:display-name="ListLabel 171" style:family="text">
      <style:text-properties style:font-name="Calibri" fo:font-family="Calibri" style:font-pitch="variable" fo:font-size="10pt" style:font-size-asian="10pt"/>
    </style:style>
    <style:style style:name="ListLabel_20_172" style:display-name="ListLabel 172" style:family="text">
      <style:text-properties style:font-name="Calibri1" fo:font-family="Calibri" style:font-family-generic="roman" style:font-pitch="variable" fo:font-size="10pt" style:font-size-asian="10pt"/>
    </style:style>
    <style:style style:name="ListLabel_20_173" style:display-name="ListLabel 173" style:family="text">
      <style:text-properties style:font-name="Calibri" fo:font-family="Calibri" style:font-pitch="variable" fo:font-size="10pt" style:font-size-asian="10pt"/>
    </style:style>
    <style:style style:name="ListLabel_20_174" style:display-name="ListLabel 174" style:family="text">
      <style:text-properties style:font-name="Calibri" fo:font-family="Calibri" style:font-pitch="variable" fo:font-size="10pt" style:font-size-asian="10pt"/>
    </style:style>
    <style:style style:name="ListLabel_20_175" style:display-name="ListLabel 175" style:family="text">
      <style:text-properties style:font-name="Calibri" fo:font-family="Calibri" style:font-pitch="variable" fo:font-size="10pt" style:font-size-asian="10pt"/>
    </style:style>
    <style:style style:name="ListLabel_20_176" style:display-name="ListLabel 176" style:family="text">
      <style:text-properties style:font-name="Calibri" fo:font-family="Calibri" style:font-pitch="variable" fo:font-size="10pt" style:font-size-asian="10pt"/>
    </style:style>
    <style:style style:name="ListLabel_20_177" style:display-name="ListLabel 177" style:family="text">
      <style:text-properties style:font-name="Calibri" fo:font-family="Calibri" style:font-pitch="variable" fo:font-size="10pt" style:font-size-asian="10pt"/>
    </style:style>
    <style:style style:name="ListLabel_20_178" style:display-name="ListLabel 178" style:family="text">
      <style:text-properties style:font-name="Calibri" fo:font-family="Calibri" style:font-pitch="variable" fo:font-size="10pt" style:font-size-asian="10pt"/>
    </style:style>
    <style:style style:name="ListLabel_20_179" style:display-name="ListLabel 179" style:family="text">
      <style:text-properties style:font-name="Calibri" fo:font-family="Calibri" style:font-pitch="variable" fo:font-size="10pt" style:font-size-asian="10pt"/>
    </style:style>
    <style:style style:name="ListLabel_20_180" style:display-name="ListLabel 180" style:family="text">
      <style:text-properties style:font-name="Calibri" fo:font-family="Calibri" style:font-pitch="variable" fo:font-size="10pt" style:font-size-asian="10pt"/>
    </style:style>
    <style:style style:name="ListLabel_20_181" style:display-name="ListLabel 181" style:family="text">
      <style:text-properties style:font-name="Calibri1" fo:font-family="Calibri" style:font-family-generic="roman" style:font-pitch="variable" fo:font-size="10pt" style:font-size-asian="10pt"/>
    </style:style>
    <style:style style:name="ListLabel_20_182" style:display-name="ListLabel 182" style:family="text">
      <style:text-properties style:font-name="Calibri" fo:font-family="Calibri" style:font-pitch="variable" fo:font-size="10pt" style:font-size-asian="10pt"/>
    </style:style>
    <style:style style:name="ListLabel_20_183" style:display-name="ListLabel 183" style:family="text">
      <style:text-properties style:font-name="Calibri" fo:font-family="Calibri" style:font-pitch="variable" fo:font-size="10pt" style:font-size-asian="10pt"/>
    </style:style>
    <style:style style:name="ListLabel_20_184" style:display-name="ListLabel 184" style:family="text">
      <style:text-properties style:font-name="Calibri" fo:font-family="Calibri" style:font-pitch="variable" fo:font-size="10pt" style:font-size-asian="10pt"/>
    </style:style>
    <style:style style:name="ListLabel_20_185" style:display-name="ListLabel 185" style:family="text">
      <style:text-properties style:font-name="Calibri" fo:font-family="Calibri" style:font-pitch="variable" fo:font-size="10pt" style:font-size-asian="10pt"/>
    </style:style>
    <style:style style:name="ListLabel_20_186" style:display-name="ListLabel 186" style:family="text">
      <style:text-properties style:font-name="Calibri" fo:font-family="Calibri" style:font-pitch="variable" fo:font-size="10pt" style:font-size-asian="10pt"/>
    </style:style>
    <style:style style:name="ListLabel_20_187" style:display-name="ListLabel 187" style:family="text">
      <style:text-properties style:font-name="Calibri" fo:font-family="Calibri" style:font-pitch="variable" fo:font-size="10pt" style:font-size-asian="10pt"/>
    </style:style>
    <style:style style:name="ListLabel_20_188" style:display-name="ListLabel 188" style:family="text">
      <style:text-properties style:font-name="Calibri" fo:font-family="Calibri" style:font-pitch="variable" fo:font-size="10pt" style:font-size-asian="10pt"/>
    </style:style>
    <style:style style:name="ListLabel_20_189" style:display-name="ListLabel 189" style:family="text">
      <style:text-properties style:font-name="Calibri" fo:font-family="Calibri" style:font-pitch="variable" fo:font-size="10pt" style:font-size-asian="10pt"/>
    </style:style>
    <style:style style:name="ListLabel_20_190" style:display-name="ListLabel 190" style:family="text">
      <style:text-properties style:font-name="Calibri1" fo:font-family="Calibri" style:font-family-generic="roman" style:font-pitch="variable" fo:font-size="10pt" style:font-size-asian="10pt"/>
    </style:style>
    <style:style style:name="ListLabel_20_191" style:display-name="ListLabel 191" style:family="text">
      <style:text-properties style:font-name="Calibri" fo:font-family="Calibri" style:font-pitch="variable" fo:font-size="10pt" style:font-size-asian="10pt"/>
    </style:style>
    <style:style style:name="ListLabel_20_192" style:display-name="ListLabel 192" style:family="text">
      <style:text-properties style:font-name="Calibri" fo:font-family="Calibri" style:font-pitch="variable" fo:font-size="10pt" style:font-size-asian="10pt"/>
    </style:style>
    <style:style style:name="ListLabel_20_193" style:display-name="ListLabel 193" style:family="text">
      <style:text-properties style:font-name="Calibri" fo:font-family="Calibri" style:font-pitch="variable" fo:font-size="10pt" style:font-size-asian="10pt"/>
    </style:style>
    <style:style style:name="ListLabel_20_194" style:display-name="ListLabel 194" style:family="text">
      <style:text-properties style:font-name="Calibri" fo:font-family="Calibri" style:font-pitch="variable" fo:font-size="10pt" style:font-size-asian="10pt"/>
    </style:style>
    <style:style style:name="ListLabel_20_195" style:display-name="ListLabel 195" style:family="text">
      <style:text-properties style:font-name="Calibri" fo:font-family="Calibri" style:font-pitch="variable" fo:font-size="10pt" style:font-size-asian="10pt"/>
    </style:style>
    <style:style style:name="ListLabel_20_196" style:display-name="ListLabel 196" style:family="text">
      <style:text-properties style:font-name="Calibri" fo:font-family="Calibri" style:font-pitch="variable" fo:font-size="10pt" style:font-size-asian="10pt"/>
    </style:style>
    <style:style style:name="ListLabel_20_197" style:display-name="ListLabel 197" style:family="text">
      <style:text-properties style:font-name="Calibri" fo:font-family="Calibri" style:font-pitch="variable" fo:font-size="10pt" style:font-size-asian="10pt"/>
    </style:style>
    <style:style style:name="ListLabel_20_198" style:display-name="ListLabel 198" style:family="text">
      <style:text-properties style:font-name="Calibri" fo:font-family="Calibri" style:font-pitch="variable"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color="#0000ff" loext:opacity="100%" style:text-underline-style="solid" style:text-underline-width="auto" style:text-underline-color="font-color"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ListLabel_20_209" style:display-name="ListLabel 209" style:family="text">
      <style:text-properties style:font-name-asian="Calibri2" style:font-family-asian="Calibri" style:font-family-generic-asian="system" style:font-pitch-asian="variable"/>
    </style:style>
    <style:style style:name="ListLabel_20_210" style:display-name="ListLabel 2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uk</meta:initial-creator>
    <meta:editing-cycles>72</meta:editing-cycles>
    <meta:print-date>2025-12-25T12:56:21.074811900</meta:print-date>
    <meta:creation-date>2025-11-16T07:54:00</meta:creation-date>
    <dc:date>2026-03-25T14:51:05.453454300</dc:date>
    <meta:editing-duration>PT2H18M36S</meta:editing-duration>
    <meta:generator>LibreOffice/25.8.1.1$Windows_X86_64 LibreOffice_project/54047653041915e595ad4e45cccea684809c77b5</meta:generator>
    <meta:printed-by>PDF files</meta:printed-by>
    <meta:document-statistic meta:table-count="1" meta:image-count="43" meta:object-count="0" meta:page-count="41" meta:paragraph-count="753" meta:word-count="6640" meta:character-count="38283" meta:non-whitespace-character-count="31891"/>
    <meta:user-defined meta:name="AppVersion">16.0000</meta:user-defined>
    <meta:template xlink:type="simple" xlink:actuate="onRequest" xlink:title="Normal.dotm" xlink:href=""/>
  </office:meta>
</office:document-meta>
</file>